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</text:p>
      <text:p text:style-name="Standard">RÊVES — INTERPRÉTATIONS SELON LA TRADITION DU VODOU HAÏTIEN</text:p>
      <text:p text:style-name="Standard">Oniromancie vodou · Symboles, lwa associés, actions rituelles</text:p>
      <text:p text:style-name="Standard">================================================================</text:p>
      <text:p text:style-name="Standard"/>
      <text:p text:style-name="Standard">Sources : tradition orale vodou haïtien, protectionhouse.org,</text:p>
      <text:p text:style-name="Standard">louisianavoodoo.com, plante-essentielle.com,</text:p>
      <text:p text:style-name="Standard">anthroencyclopedia.com, visithaiti.com, britannica.com</text:p>
      <text:p text:style-name="Standard"/>
      <text:p text:style-name="Standard"/>
      <text:p text:style-name="Standard">================================================================</text:p>
      <text:p text:style-name="Standard">PRINCIPE FONDAMENTAL DES RÊVES DANS LE VODOU HAÏTIEN</text:p>
      <text:p text:style-name="Standard">================================================================</text:p>
      <text:p text:style-name="Standard"/>
      <text:p text:style-name="Standard">Dans le vodou haïtien, un rêve n'est jamais "juste un rêve".</text:p>
      <text:p text:style-name="Standard">Il est une visite. Un espace sacré où le voile entre le monde</text:p>
      <text:p text:style-name="Standard">physique et le monde des esprits devient perméable. Les lwa, les</text:p>
      <text:p text:style-name="Standard">ancêtres, les forces cosmiques utilisent le rêve comme canal</text:p>
      <text:p text:style-name="Standard">principal de communication avec les vivants.</text:p>
      <text:p text:style-name="Standard"/>
      <text:p text:style-name="Standard">Le Ti Bon Ange (la partie personnelle et individuelle de l'âme)</text:p>
      <text:p text:style-name="Standard">se libère partiellement pendant le sommeil et peut voyager dans</text:p>
      <text:p text:style-name="Standard">le monde des esprits. C'est dans cet état de voyage que les lwa</text:p>
      <text:p text:style-name="Standard">se manifestent, délivrent leurs messages, leurs avertissements,</text:p>
      <text:p text:style-name="Standard">leurs bénédictions.</text:p>
      <text:p text:style-name="Standard"/>
      <text:p text:style-name="Standard">QUATRE TYPES DE RÊVES DANS LE VODOU :</text:p>
      <text:p text:style-name="Standard">1. Rêve de révélation <text:s text:c="3"/>— message clair d'un lwa ou ancêtre</text:p>
      <text:p text:style-name="Standard">2. Rêve d'avertissement <text:s/>— danger ou situation à éviter</text:p>
      <text:p text:style-name="Standard">3. Rêve prophétique <text:s text:c="5"/>— prédiction d'événements futurs</text:p>
      <text:p text:style-name="Standard">4. Rêve de guérison <text:s text:c="5"/>— solution à un problème spirituel</text:p>
      <text:p text:style-name="Standard"/>
      <text:p text:style-name="Standard">NOTE : L'interprétation finale appartient toujours à un houngan</text:p>
      <text:p text:style-name="Standard">ou une manbo. Les interprétations ci-dessous sont les bases</text:p>
      <text:p text:style-name="Standard">universelles de la tradition.</text:p>
      <text:p text:style-name="Standard"/>
      <text:p text:style-name="Standard"/>
      <text:p text:style-name="Standard">================================================================</text:p>
      <text:p text:style-name="Standard">SECTION I — RÊVES D'ANIMAUX SACRÉS</text:p>
      <text:p text:style-name="Standard">================================================================</text:p>
      <text:p text:style-name="Standard"/>
      <text:p text:style-name="Standard"/>
      <text:p text:style-name="Standard">----------------------------------------------------------------</text:p>
      <text:p text:style-name="Standard">RÊVE #01 — LE SERPENT</text:p>
      <text:p text:style-name="Standard">----------------------------------------------------------------</text:p>
      <text:p text:style-name="Standard">LWA ASSOCIÉ <text:s text:c="2"/>: Danbala Wedo (et Ayida Wedo)</text:p>
      <text:p text:style-name="Standard">NANCHON <text:s text:c="6"/>: Rada</text:p>
      <text:p text:style-name="Standard"/>
      <text:p text:style-name="Standard">DESCRIPTION DU RÊVE :</text:p>
      <text:p text:style-name="Standard">Voir un serpent, être entouré de serpents, voir un grand serpent</text:p>
      <text:p text:style-name="Standard">blanc ou deux serpents enlacés.</text:p>
      <text:p text:style-name="Standard"/>
      <text:p text:style-name="Standard"><text:soft-page-break/>INTERPRÉTATION VODOU :</text:p>
      <text:p text:style-name="Standard">Le serpent est l'un des symboles les plus puissants du vodou</text:p>
      <text:p text:style-name="Standard">haïtien. Il représente directement Danbala Wedo — le plus ancien</text:p>
      <text:p text:style-name="Standard">des lwa, père de toute création. Voir un serpent en rêve signifie</text:p>
      <text:p text:style-name="Standard">que Danbala se manifeste. C'est un signe de sagesse profonde,</text:p>
      <text:p text:style-name="Standard">de renouveau, de transformation et d'accès à la connaissance</text:p>
      <text:p text:style-name="Standard">ancestrale.</text:p>
      <text:p text:style-name="Standard"/>
      <text:p text:style-name="Standard">NUANCES SELON LA COULEUR :</text:p>
      <text:p text:style-name="Standard">- Serpent blanc <text:s text:c="4"/>→ Danbala lui-même, pureté, sagesse cosmique</text:p>
      <text:p text:style-name="Standard">- Serpent arc-en-ciel → Ayida Wedo, harmonie, fertilité, création</text:p>
      <text:p text:style-name="Standard">- Serpent noir <text:s text:c="5"/>→ avertissement, énergie bloquée à dénouer</text:p>
      <text:p text:style-name="Standard">- Serpent qui mord <text:s/>→ quelque chose de non-résolu demande attention</text:p>
      <text:p text:style-name="Standard"/>
      <text:p text:style-name="Standard">SIGNIFICATION PROFONDE :</text:p>
      <text:p text:style-name="Standard">Danbala a formé la Terre avec ses 7 000 anneaux. Rêver de lui,</text:p>
      <text:p text:style-name="Standard">c'est recevoir un message de l'origine même de la vie. Ce rêve</text:p>
      <text:p text:style-name="Standard">indique souvent qu'une transformation profonde est en cours ou</text:p>
      <text:p text:style-name="Standard">que le rêveur est appelé à un chemin spirituel.</text:p>
      <text:p text:style-name="Standard"/>
      <text:p text:style-name="Standard">ACTION RITUELLE RECOMMANDÉE :</text:p>
      <text:p text:style-name="Standard">Préparer un autel blanc. Offrir un œuf blanc cru sur lit de</text:p>
      <text:p text:style-name="Standard">farine blanche, du lait, des fleurs blanches, de l'eau pure.</text:p>
      <text:p text:style-name="Standard">Allumer une bougie blanche. Remercier Danbala pour sa visite.</text:p>
      <text:p text:style-name="Standard"/>
      <text:p text:style-name="Standard"/>
      <text:p text:style-name="Standard">----------------------------------------------------------------</text:p>
      <text:p text:style-name="Standard">RÊVE #02 — LE CHEVAL</text:p>
      <text:p text:style-name="Standard">----------------------------------------------------------------</text:p>
      <text:p text:style-name="Standard">LWA ASSOCIÉ <text:s text:c="2"/>: Papa Legba / Ogou / Marassa</text:p>
      <text:p text:style-name="Standard">NANCHON <text:s text:c="6"/>: Rada</text:p>
      <text:p text:style-name="Standard"/>
      <text:p text:style-name="Standard">DESCRIPTION DU RÊVE :</text:p>
      <text:p text:style-name="Standard">Voir un cheval, chevaucher un cheval, être poursuivi par un</text:p>
      <text:p text:style-name="Standard">cheval, voir un cheval blanc ou noir.</text:p>
      <text:p text:style-name="Standard"/>
      <text:p text:style-name="Standard">INTERPRÉTATION VODOU :</text:p>
      <text:p text:style-name="Standard">Le cheval est le symbole de la "possession" dans le vodou —</text:p>
      <text:p text:style-name="Standard">le lwa "monte" son serviteur comme un cavalier monte son cheval.</text:p>
      <text:p text:style-name="Standard">Rêver d'un cheval signifie qu'un lwa cherche à entrer en contact</text:p>
      <text:p text:style-name="Standard">direct avec le rêveur. C'est l'un des rêves les plus sérieux</text:p>
      <text:p text:style-name="Standard">de la tradition — il ne doit pas être ignoré.</text:p>
      <text:p text:style-name="Standard"/>
      <text:p text:style-name="Standard">NUANCES :</text:p>
      <text:p text:style-name="Standard">- Cheval blanc qui vient calmement → invitation spirituelle douce</text:p>
      <text:p text:style-name="Standard">- Cheval qui galope librement <text:s text:c="4"/>→ liberté, mouvement entre mondes</text:p>
      <text:p text:style-name="Standard">- Être sur un cheval <text:s text:c="14"/>→ le rêveur est "choisi"</text:p>
      <text:p text:style-name="Standard">- Cheval qui s'échappe <text:s text:c="12"/>→ un lwa cherche à vous rejoindre</text:p>
      <text:p text:style-name="Standard"><text:s text:c="37"/>mais quelque chose bloque le lien</text:p>
      <text:p text:style-name="Standard"/>
      <text:p text:style-name="Standard">Dans la tradition des Marassa, le cheval symbolise aussi la</text:p>
      <text:p text:style-name="Standard">force, la liberté et la capacité à circuler entre les mondes.</text:p>
      <text:p text:style-name="Standard"><text:soft-page-break/></text:p>
      <text:p text:style-name="Standard">ACTION RITUELLE RECOMMANDÉE :</text:p>
      <text:p text:style-name="Standard">Consulter un houngan ou une manbo pour identifier quel lwa</text:p>
      <text:p text:style-name="Standard">cherche à établir une relation. Ce rêve peut précéder une</text:p>
      <text:p text:style-name="Standard">initiation ou un mariage mystique avec un lwa.</text:p>
      <text:p text:style-name="Standard"/>
      <text:p text:style-name="Standard"/>
      <text:p text:style-name="Standard">----------------------------------------------------------------</text:p>
      <text:p text:style-name="Standard">RÊVE #03 — LE CHIEN</text:p>
      <text:p text:style-name="Standard">----------------------------------------------------------------</text:p>
      <text:p text:style-name="Standard">LWA ASSOCIÉ <text:s text:c="2"/>: Papa Legba</text:p>
      <text:p text:style-name="Standard">NANCHON <text:s text:c="6"/>: Rada</text:p>
      <text:p text:style-name="Standard"/>
      <text:p text:style-name="Standard">DESCRIPTION DU RÊVE :</text:p>
      <text:p text:style-name="Standard">Voir un chien, être accompagné par un chien, voir un vieux</text:p>
      <text:p text:style-name="Standard">chien à un carrefour.</text:p>
      <text:p text:style-name="Standard"/>
      <text:p text:style-name="Standard">INTERPRÉTATION VODOU :</text:p>
      <text:p text:style-name="Standard">Le chien est l'animal totem de Papa Legba, gardien des carrefours</text:p>
      <text:p text:style-name="Standard">et des portes entre mondes. Rêver d'un chien indique que Legba</text:p>
      <text:p text:style-name="Standard">tente d'ouvrir un passage — qu'un chemin nouveau va s'ouvrir dans</text:p>
      <text:p text:style-name="Standard">la vie du rêveur, ou qu'une décision importante se présente.</text:p>
      <text:p text:style-name="Standard"/>
      <text:p text:style-name="Standard">NUANCES :</text:p>
      <text:p text:style-name="Standard">- Chien qui guide <text:s text:c="3"/>→ Legba vous montre un chemin à suivre</text:p>
      <text:p text:style-name="Standard">- Chien blessé <text:s text:c="6"/>→ un passage est bloqué, une porte fermée</text:p>
      <text:p text:style-name="Standard">- Chien qui aboie <text:s text:c="3"/>→ avertissement : une décision risquée se prépare</text:p>
      <text:p text:style-name="Standard">- Chien fidèle <text:s text:c="6"/>→ protection ancestrale assurée</text:p>
      <text:p text:style-name="Standard"/>
      <text:p text:style-name="Standard">SIGNIFICATION PROFONDE :</text:p>
      <text:p text:style-name="Standard">Legba parle en premier dans toute cérémonie. S'il se manifeste</text:p>
      <text:p text:style-name="Standard">dans les rêves, il est urgent d'écouter.</text:p>
      <text:p text:style-name="Standard"/>
      <text:p text:style-name="Standard">ACTION RITUELLE RECOMMANDÉE :</text:p>
      <text:p text:style-name="Standard">Offrir à Legba au carrefour : du café noir, du rhum blanc,</text:p>
      <text:p text:style-name="Standard">des ignames, une bougie jaune. Lui demander d'ouvrir le chemin.</text:p>
      <text:p text:style-name="Standard"/>
      <text:p text:style-name="Standard"/>
      <text:p text:style-name="Standard">----------------------------------------------------------------</text:p>
      <text:p text:style-name="Standard">RÊVE #04 — LE COCOQ / COQ</text:p>
      <text:p text:style-name="Standard">----------------------------------------------------------------</text:p>
      <text:p text:style-name="Standard">LWA ASSOCIÉ <text:s text:c="2"/>: Ogou Feray / Marassa / selon couleur</text:p>
      <text:p text:style-name="Standard">NANCHON <text:s text:c="6"/>: Nago / Rada</text:p>
      <text:p text:style-name="Standard"/>
      <text:p text:style-name="Standard">DESCRIPTION DU RÊVE :</text:p>
      <text:p text:style-name="Standard">Voir un coq, entendre un coq chanter, voir un coq rouge ou noir.</text:p>
      <text:p text:style-name="Standard"/>
      <text:p text:style-name="Standard">INTERPRÉTATION VODOU :</text:p>
      <text:p text:style-name="Standard">Le coq est un animal sacrificiel fondamental dans le vodou. Le</text:p>
      <text:p text:style-name="Standard">voir en rêve est signe d'un appel à agir, à se lever, à prendre</text:p>
      <text:p text:style-name="Standard">position. Ogou Feray (le guerrier) appelle souvent à travers</text:p>
      <text:p text:style-name="Standard">l'image du coq rouge.</text:p>
      <text:p text:style-name="Standard"><text:soft-page-break/></text:p>
      <text:p text:style-name="Standard">NUANCES :</text:p>
      <text:p text:style-name="Standard">- Coq rouge <text:s/>→ Ogou appelle à la force, à la lutte, au leadership</text:p>
      <text:p text:style-name="Standard">- Coq noir <text:s text:c="2"/>→ connexion à la famille Gede, transformation par la mort</text:p>
      <text:p text:style-name="Standard">- Coq blanc <text:s/>→ offrande attendue, purification nécessaire</text:p>
      <text:p text:style-name="Standard">- Coq chantant → aube spirituelle, commencement d'un nouveau cycle</text:p>
      <text:p text:style-name="Standard"/>
      <text:p text:style-name="Standard"/>
      <text:p text:style-name="Standard">----------------------------------------------------------------</text:p>
      <text:p text:style-name="Standard">RÊVE #05 — LE TAUREAU</text:p>
      <text:p text:style-name="Standard">----------------------------------------------------------------</text:p>
      <text:p text:style-name="Standard">LWA ASSOCIÉ <text:s text:c="2"/>: Bossou / Bosou Trois Cornes</text:p>
      <text:p text:style-name="Standard">NANCHON <text:s text:c="6"/>: Rada / Petro</text:p>
      <text:p text:style-name="Standard"/>
      <text:p text:style-name="Standard">DESCRIPTION DU RÊVE :</text:p>
      <text:p text:style-name="Standard">Voir un taureau puissant, être chargé par un taureau, voir des</text:p>
      <text:p text:style-name="Standard">cornes.</text:p>
      <text:p text:style-name="Standard"/>
      <text:p text:style-name="Standard">INTERPRÉTATION VODOU :</text:p>
      <text:p text:style-name="Standard">Le taureau est le symbole des Taureaux Royaux — loas gardes issus</text:p>
      <text:p text:style-name="Standard">de la famille royale du Dahomey. Voir un taureau en rêve est signe</text:p>
      <text:p text:style-name="Standard">d'une protection royale ancestrale en action, ou d'une force</text:p>
      <text:p text:style-name="Standard">qui cherche à se manifester dans la vie du rêveur.</text:p>
      <text:p text:style-name="Standard"/>
      <text:p text:style-name="Standard">- Taureau calme <text:s text:c="4"/>→ protection royale, ancêtres veillent</text:p>
      <text:p text:style-name="Standard">- Taureau qui charge → attention, une force excessive est déclenchée</text:p>
      <text:p text:style-name="Standard">- Trois cornes <text:s text:c="5"/>→ Bosou Trois Cornes (Petro) : puissance triple,</text:p>
      <text:p text:style-name="Standard"><text:s text:c="22"/>situation qui demande une réponse forte</text:p>
      <text:p text:style-name="Standard"/>
      <text:p text:style-name="Standard"/>
      <text:p text:style-name="Standard">================================================================</text:p>
      <text:p text:style-name="Standard">SECTION II — RÊVES D'ÉLÉMENTS NATURELS</text:p>
      <text:p text:style-name="Standard">================================================================</text:p>
      <text:p text:style-name="Standard"/>
      <text:p text:style-name="Standard"/>
      <text:p text:style-name="Standard">----------------------------------------------------------------</text:p>
      <text:p text:style-name="Standard">RÊVE #06 — L'EAU</text:p>
      <text:p text:style-name="Standard">----------------------------------------------------------------</text:p>
      <text:p text:style-name="Standard">LWA ASSOCIÉS <text:s/>: Danbala, Agwé, Simbi, La Sirène, Ayida Wedo</text:p>
      <text:p text:style-name="Standard">NANCHON <text:s text:c="6"/>: Rada / Kongo</text:p>
      <text:p text:style-name="Standard"/>
      <text:p text:style-name="Standard">DESCRIPTION DU RÊVE :</text:p>
      <text:p text:style-name="Standard">Rêver d'eau sous toutes ses formes : rivière, mer, océan, source,</text:p>
      <text:p text:style-name="Standard">pluie, inondation, eau claire ou trouble.</text:p>
      <text:p text:style-name="Standard"/>
      <text:p text:style-name="Standard">INTERPRÉTATION VODOU :</text:p>
      <text:p text:style-name="Standard">L'eau est sacrée dans le vodou haïtien — elle est à la fois</text:p>
      <text:p text:style-name="Standard">vie, âme, mémoire des ancêtres et chemin vers Ginen (le monde</text:p>
      <text:p text:style-name="Standard">spirituel sous-marin). Rêver d'eau est l'un des rêves les plus</text:p>
      <text:p text:style-name="Standard">complexes car le lwa révélé dépend du type d'eau.</text:p>
      <text:p text:style-name="Standard"/>
      <text:p text:style-name="Standard">NUANCES SELON LE TYPE :</text:p>
      <text:p text:style-name="Standard"><text:soft-page-break/></text:p>
      <text:p text:style-name="Standard">Eau claire, calme, profonde :</text:p>
      <text:p text:style-name="Standard">→ Agwé ou La Sirène : voyage spirituel, abondance marine à venir,</text:p>
      <text:p text:style-name="Standard"><text:s text:c="2"/>invitation dans le royaume sous-marin de Nan Zile.</text:p>
      <text:p text:style-name="Standard"><text:s text:c="2"/>Le rêveur est peut-être en relation avec Agwé ou La Sirène.</text:p>
      <text:p text:style-name="Standard"/>
      <text:p text:style-name="Standard">Rivière ou source douce :</text:p>
      <text:p text:style-name="Standard">→ Simbi : guérison, clairvoyance, accès à la connaissance cachée.</text:p>
      <text:p text:style-name="Standard"><text:s text:c="2"/>Simbi, gardien des eaux douces, offre ses dons au rêveur.</text:p>
      <text:p text:style-name="Standard"/>
      <text:p text:style-name="Standard">Eau arc-en-ciel ou lumineuse :</text:p>
      <text:p text:style-name="Standard">→ Ayida Wedo : création, fertilité, harmonie cosmique.</text:p>
      <text:p text:style-name="Standard"/>
      <text:p text:style-name="Standard">Eau trouble, boueuse :</text:p>
      <text:p text:style-name="Standard">→ Situation émotionnelle ou spirituelle confuse à clarifier.</text:p>
      <text:p text:style-name="Standard"><text:s text:c="2"/>Un blocage dans le chemin spirituel.</text:p>
      <text:p text:style-name="Standard"/>
      <text:p text:style-name="Standard">Inondation :</text:p>
      <text:p text:style-name="Standard">→ Les émotions ou les forces spirituelles dépassent les limites.</text:p>
      <text:p text:style-name="Standard"><text:s text:c="2"/>Un lwa demande une cérémonie, son appel a été ignoré trop longtemps.</text:p>
      <text:p text:style-name="Standard"/>
      <text:p text:style-name="Standard">Se noyer :</text:p>
      <text:p text:style-name="Standard">→ Le rêveur est submergé par des énergies spirituelles non gérées.</text:p>
      <text:p text:style-name="Standard"><text:s text:c="2"/>Urgence de consulter un praticien.</text:p>
      <text:p text:style-name="Standard"/>
      <text:p text:style-name="Standard">Marcher sur l'eau :</text:p>
      <text:p text:style-name="Standard">→ Connexion profonde aux esprits marins, capacités spirituelles</text:p>
      <text:p text:style-name="Standard"><text:s text:c="2"/>développées, maîtrise du monde invisible.</text:p>
      <text:p text:style-name="Standard"/>
      <text:p text:style-name="Standard">ACTION RITUELLE RECOMMANDÉE :</text:p>
      <text:p text:style-name="Standard">Selon le type d'eau vu, offrir au lwa correspondant. Pour Agwé :</text:p>
      <text:p text:style-name="Standard">champagne, poissons, fleurs bleues sur un radeau lancé en mer.</text:p>
      <text:p text:style-name="Standard">Pour Simbi : eau de rivière, herbes vertes, libations à la source.</text:p>
      <text:p text:style-name="Standard"/>
      <text:p text:style-name="Standard"/>
      <text:p text:style-name="Standard">----------------------------------------------------------------</text:p>
      <text:p text:style-name="Standard">RÊVE #07 — LE FEU</text:p>
      <text:p text:style-name="Standard">----------------------------------------------------------------</text:p>
      <text:p text:style-name="Standard">LWA ASSOCIÉS <text:s/>: Ogou Feray / Kalfou / Lwa Petro</text:p>
      <text:p text:style-name="Standard">NANCHON <text:s text:c="6"/>: Nago / Petro</text:p>
      <text:p text:style-name="Standard"/>
      <text:p text:style-name="Standard">DESCRIPTION DU RÊVE :</text:p>
      <text:p text:style-name="Standard">Voir du feu, être entouré de flammes, voir une forge ou des</text:p>
      <text:p text:style-name="Standard">braises, rêver d'incendie.</text:p>
      <text:p text:style-name="Standard"/>
      <text:p text:style-name="Standard">INTERPRÉTATION VODOU :</text:p>
      <text:p text:style-name="Standard">Le feu est l'élément central du rite Petro — le rite né de la</text:p>
      <text:p text:style-name="Standard">résistance, de la révolution, de la libération. Dans le vodou,</text:p>
      <text:p text:style-name="Standard">le feu ne détruit pas seulement : il transforme, purifie et forge.</text:p>
      <text:p text:style-name="Standard">Ogou Feray, le guerrier, est intimement lié au feu de la forge.</text:p>
      <text:p text:style-name="Standard"/>
      <text:p text:style-name="Standard">NUANCES :</text:p>
      <text:p text:style-name="Standard"><text:soft-page-break/>- Feu de forge contrôlé → Ogou forge quelque chose dans ta vie.</text:p>
      <text:p text:style-name="Standard"><text:s text:c="26"/>Une transformation par l'épreuve est en cours.</text:p>
      <text:p text:style-name="Standard">- Flammes vives et belles → passion, courage, leadership à venir.</text:p>
      <text:p text:style-name="Standard"><text:s text:c="28"/>Un appel à l'action forte.</text:p>
      <text:p text:style-name="Standard">- Incendie non maîtrisé <text:s/>→ colère spirituelle non résolue.</text:p>
      <text:p text:style-name="Standard"><text:s text:c="27"/>Quelque chose doit être libéré avant destruction.</text:p>
      <text:p text:style-name="Standard">- Feu au carrefour <text:s text:c="6"/>→ Kalfou est actif. Danger si le chemin choisi</text:p>
      <text:p text:style-name="Standard"><text:s text:c="27"/>est sombre. Attention aux décisions nocturnes.</text:p>
      <text:p text:style-name="Standard">- Feu qui réchauffe sans brûler → protection spirituelle du rite Petro.</text:p>
      <text:p text:style-name="Standard"/>
      <text:p text:style-name="Standard">SIGNIFICATION PROFONDE :</text:p>
      <text:p text:style-name="Standard">Le feu Petro est né de la souffrance des esclaves. Rêver de feu</text:p>
      <text:p text:style-name="Standard">dans la tradition vodou, c'est souvent un appel à la résistance,</text:p>
      <text:p text:style-name="Standard">à ne pas se laisser écraser par les circonstances.</text:p>
      <text:p text:style-name="Standard"/>
      <text:p text:style-name="Standard">ACTION RITUELLE RECOMMANDÉE :</text:p>
      <text:p text:style-name="Standard">Offrir à Ogou : rhum vieux, bougie rouge, machette symbolique.</text:p>
      <text:p text:style-name="Standard">Dire à voix haute ce qu'il faut lâcher et ce qu'il faut forger.</text:p>
      <text:p text:style-name="Standard"/>
      <text:p text:style-name="Standard"/>
      <text:p text:style-name="Standard">----------------------------------------------------------------</text:p>
      <text:p text:style-name="Standard">RÊVE #08 — L'ARC-EN-CIEL</text:p>
      <text:p text:style-name="Standard">----------------------------------------------------------------</text:p>
      <text:p text:style-name="Standard">LWA ASSOCIÉ <text:s text:c="2"/>: Ayida Wedo (et Danbala)</text:p>
      <text:p text:style-name="Standard">NANCHON <text:s text:c="6"/>: Rada</text:p>
      <text:p text:style-name="Standard"/>
      <text:p text:style-name="Standard">DESCRIPTION DU RÊVE :</text:p>
      <text:p text:style-name="Standard">Voir un arc-en-ciel lumineux, être entouré de couleurs vives</text:p>
      <text:p text:style-name="Standard">dans le ciel, voir deux serpents formant un arc.</text:p>
      <text:p text:style-name="Standard"/>
      <text:p text:style-name="Standard">INTERPRÉTATION VODOU :</text:p>
      <text:p text:style-name="Standard">L'arc-en-ciel est la signature visuelle d'Ayida Wedo, épouse</text:p>
      <text:p text:style-name="Standard">cosmique de Danbala. C'est l'un des rêves les plus bénis de la</text:p>
      <text:p text:style-name="Standard">tradition. Il annonce harmonie, fertilité, réconciliation des</text:p>
      <text:p text:style-name="Standard">contraires, création et équilibre entre les mondes.</text:p>
      <text:p text:style-name="Standard"/>
      <text:p text:style-name="Standard">- Arc-en-ciel complet <text:s/>→ bénédiction d'Ayida Wedo : harmonie totale</text:p>
      <text:p text:style-name="Standard"><text:s text:c="25"/>à venir, abondance, création nouvelle.</text:p>
      <text:p text:style-name="Standard">- Arc-en-ciel partiel <text:s/>→ une partie de l'harmonie est là ;</text:p>
      <text:p text:style-name="Standard"><text:s text:c="25"/>l'autre est encore à construire.</text:p>
      <text:p text:style-name="Standard">- Arc-en-ciel sur l'eau → union de Danbala et Ayida : création</text:p>
      <text:p text:style-name="Standard"><text:s text:c="27"/>primordiale en action dans la vie du rêveur.</text:p>
      <text:p text:style-name="Standard"/>
      <text:p text:style-name="Standard">ACTION RITUELLE RECOMMANDÉE :</text:p>
      <text:p text:style-name="Standard">Offrir ensemble à Danbala et Ayida : œuf blanc, tissu arc-en-ciel,</text:p>
      <text:p text:style-name="Standard">lait, eau pure, bougie blanche et bougie aux couleurs.</text:p>
      <text:p text:style-name="Standard"/>
      <text:p text:style-name="Standard"/>
      <text:p text:style-name="Standard">----------------------------------------------------------------</text:p>
      <text:p text:style-name="Standard">RÊVE #09 — L'ARBRE</text:p>
      <text:p text:style-name="Standard">----------------------------------------------------------------</text:p>
      <text:p text:style-name="Standard">LWA ASSOCIÉS <text:s/>: Gran Bwa / Loko Atissou / Ayizan</text:p>
      <text:p text:style-name="Standard"><text:soft-page-break/>NANCHON <text:s text:c="6"/>: Petro / Rada</text:p>
      <text:p text:style-name="Standard"/>
      <text:p text:style-name="Standard">DESCRIPTION DU RÊVE :</text:p>
      <text:p text:style-name="Standard">Voir un grand arbre, grimper dans un arbre, voir un arbre qui</text:p>
      <text:p text:style-name="Standard">parle, voir un palmier royal.</text:p>
      <text:p text:style-name="Standard"/>
      <text:p text:style-name="Standard">INTERPRÉTATION VODOU :</text:p>
      <text:p text:style-name="Standard">L'arbre est le pont entre la terre et le ciel dans le vodou —</text:p>
      <text:p text:style-name="Standard">il relie le monde des vivants, le monde des morts et le monde</text:p>
      <text:p text:style-name="Standard">des esprits. Gran Bwa est le maître absolu de la forêt.</text:p>
      <text:p text:style-name="Standard">Loko Atissou est le gardien des arbres médicinaux.</text:p>
      <text:p text:style-name="Standard">Le palmier royal est l'arbre sacré d'Ayizan.</text:p>
      <text:p text:style-name="Standard"/>
      <text:p text:style-name="Standard">NUANCES :</text:p>
      <text:p text:style-name="Standard">- Grand arbre stable et fort → ancrage spirituel profond,</text:p>
      <text:p text:style-name="Standard"><text:s text:c="31"/>protection ancestrale solide.</text:p>
      <text:p text:style-name="Standard">- Arbre qui parle <text:s text:c="10"/>→ Gran Bwa ou un ancêtre parle directement.</text:p>
      <text:p text:style-name="Standard"><text:s text:c="30"/>Écouter attentivement.</text:p>
      <text:p text:style-name="Standard">- Arbre fruitier en fleurs <text:s/>→ abondance, prospérité à venir.</text:p>
      <text:p text:style-name="Standard">- Palmier royal <text:s text:c="12"/>→ Ayizan est présente, initiation proche,</text:p>
      <text:p text:style-name="Standard"><text:s text:c="30"/>ou protection sacerdotale accordée.</text:p>
      <text:p text:style-name="Standard">- Arbre mort ou coupé <text:s text:c="6"/>→ une lignée ancestrale est coupée.</text:p>
      <text:p text:style-name="Standard"><text:s text:c="30"/>Un travail de reconnexion est nécessaire.</text:p>
      <text:p text:style-name="Standard">- Grimper dans un arbre <text:s text:c="4"/>→ élévation spirituelle en cours.</text:p>
      <text:p text:style-name="Standard"><text:s text:c="30"/>Le rêveur accède à une dimension supérieure.</text:p>
      <text:p text:style-name="Standard"/>
      <text:p text:style-name="Standard">ACTION RITUELLE RECOMMANDÉE :</text:p>
      <text:p text:style-name="Standard">Aller au pied d'un grand arbre. Offrir du rhum aux herbes pour</text:p>
      <text:p text:style-name="Standard">Gran Bwa. Écouter. Demander sa guidance.</text:p>
      <text:p text:style-name="Standard"/>
      <text:p text:style-name="Standard"/>
      <text:p text:style-name="Standard">----------------------------------------------------------------</text:p>
      <text:p text:style-name="Standard">RÊVE #10 — LE CIMETIÈRE / LA CROIX</text:p>
      <text:p text:style-name="Standard">----------------------------------------------------------------</text:p>
      <text:p text:style-name="Standard">LWA ASSOCIÉS <text:s/>: Baron Samedi / Maman Brigitte / Famille Gede</text:p>
      <text:p text:style-name="Standard">NANCHON <text:s text:c="6"/>: Gede</text:p>
      <text:p text:style-name="Standard"/>
      <text:p text:style-name="Standard">DESCRIPTION DU RÊVE :</text:p>
      <text:p text:style-name="Standard">Voir un cimetière, marcher parmi les tombes, voir une croix noire,</text:p>
      <text:p text:style-name="Standard">voir un homme au chapeau haut-de-forme.</text:p>
      <text:p text:style-name="Standard"/>
      <text:p text:style-name="Standard">INTERPRÉTATION VODOU :</text:p>
      <text:p text:style-name="Standard">Le cimetière est le domaine de la famille Gede — Baron Samedi,</text:p>
      <text:p text:style-name="Standard">Maman Brigitte et leurs nombreux enfants. Ce n'est PAS un rêve</text:p>
      <text:p text:style-name="Standard">de mauvais augure dans la tradition vodou. La mort, pour les</text:p>
      <text:p text:style-name="Standard">Gede, n'est pas une fin mais une transformation. Un rêve de</text:p>
      <text:p text:style-name="Standard">cimetière est souvent un message des ancêtres.</text:p>
      <text:p text:style-name="Standard"/>
      <text:p text:style-name="Standard">NUANCES :</text:p>
      <text:p text:style-name="Standard">- Cimetière calme et lumineux → les ancêtres sont en paix.</text:p>
      <text:p text:style-name="Standard"><text:s text:c="32"/>Un message de bénédiction arrive.</text:p>
      <text:p text:style-name="Standard">- Cimetière sombre et oppressant → un ancêtre non honoré demande</text:p>
      <text:p text:style-name="Standard"><text:soft-page-break/><text:s text:c="35"/>attention. Une cérémonie des morts</text:p>
      <text:p text:style-name="Standard"><text:s text:c="35"/>est nécessaire (Fèt Gede).</text:p>
      <text:p text:style-name="Standard">- Homme au chapeau noir <text:s text:c="6"/>→ Baron Samedi en personne.</text:p>
      <text:p text:style-name="Standard"><text:s text:c="32"/>Il observe. Peut-être refuse-t-il</text:p>
      <text:p text:style-name="Standard"><text:s text:c="32"/>une mort prochaine, ou signale une</text:p>
      <text:p text:style-name="Standard"><text:s text:c="32"/>transformation inévitable.</text:p>
      <text:p text:style-name="Standard">- Tombes fraîches <text:s text:c="12"/>→ fin d'un cycle, deuil à faire.</text:p>
      <text:p text:style-name="Standard"><text:s text:c="32"/>Quelque chose doit mourir pour renaître.</text:p>
      <text:p text:style-name="Standard">- Croix noire illuminée <text:s text:c="6"/>→ Baron accepte d'intervenir dans</text:p>
      <text:p text:style-name="Standard"><text:s text:c="32"/>une situation difficile.</text:p>
      <text:p text:style-name="Standard"/>
      <text:p text:style-name="Standard">SIGNIFICATION PROFONDE :</text:p>
      <text:p text:style-name="Standard">Baron Samedi est le seul lwa qui peut dire non à la mort.</text:p>
      <text:p text:style-name="Standard">S'il apparaît en rêve, il a quelque chose à dire sur la vie</text:p>
      <text:p text:style-name="Standard">ou la mort d'une situation, pas nécessairement d'une personne.</text:p>
      <text:p text:style-name="Standard"/>
      <text:p text:style-name="Standard">ACTION RITUELLE RECOMMANDÉE :</text:p>
      <text:p text:style-name="Standard">Le 2 novembre (Fèt Gede) ou à tout moment : apporter au cimetière</text:p>
      <text:p text:style-name="Standard">du rhum au piment, des cigares, une bougie noire et violette.</text:p>
      <text:p text:style-name="Standard">Remercier les ancêtres. Écouter leurs messages.</text:p>
      <text:p text:style-name="Standard"/>
      <text:p text:style-name="Standard"/>
      <text:p text:style-name="Standard">================================================================</text:p>
      <text:p text:style-name="Standard">SECTION III — RÊVES DE FIGURES HUMAINES ET DIVINES</text:p>
      <text:p text:style-name="Standard">================================================================</text:p>
      <text:p text:style-name="Standard"/>
      <text:p text:style-name="Standard"/>
      <text:p text:style-name="Standard">----------------------------------------------------------------</text:p>
      <text:p text:style-name="Standard">RÊVE #11 — UN ANCÊTRE MORT</text:p>
      <text:p text:style-name="Standard">----------------------------------------------------------------</text:p>
      <text:p text:style-name="Standard">LWA ASSOCIÉ <text:s text:c="2"/>: Gede / Ancêtres (Zansèt yo)</text:p>
      <text:p text:style-name="Standard">NANCHON <text:s text:c="6"/>: Gede / Rada</text:p>
      <text:p text:style-name="Standard"/>
      <text:p text:style-name="Standard">DESCRIPTION DU RÊVE :</text:p>
      <text:p text:style-name="Standard">Voir un parent décédé, recevoir un message d'un ancêtre mort,</text:p>
      <text:p text:style-name="Standard">être emmené dans un voyage par un défunt.</text:p>
      <text:p text:style-name="Standard"/>
      <text:p text:style-name="Standard">INTERPRÉTATION VODOU :</text:p>
      <text:p text:style-name="Standard">C'est l'un des rêves les plus importants et les plus respectés</text:p>
      <text:p text:style-name="Standard">dans la tradition vodou haïtienne. Les ancêtres qui se manifestent</text:p>
      <text:p text:style-name="Standard">en rêve ne le font jamais sans raison. Ils portent toujours un</text:p>
      <text:p text:style-name="Standard">message : avertissement, conseil, demande d'honneur, ou protection.</text:p>
      <text:p text:style-name="Standard"/>
      <text:p text:style-name="Standard">NUANCES :</text:p>
      <text:p text:style-name="Standard">- Ancêtre souriant, calme <text:s text:c="3"/>→ il est en paix à Ginen. Il vient</text:p>
      <text:p text:style-name="Standard"><text:s text:c="31"/>bénir ou prévenir.</text:p>
      <text:p text:style-name="Standard">- Ancêtre qui parle <text:s text:c="9"/>→ message direct et urgent. Se souvenir</text:p>
      <text:p text:style-name="Standard"><text:s text:c="31"/>exactement des mots prononcés.</text:p>
      <text:p text:style-name="Standard">- Ancêtre triste ou agité <text:s text:c="3"/>→ il n'a pas été honoré. Un rituel funèbre</text:p>
      <text:p text:style-name="Standard"><text:s text:c="31"/>(Dessounin) ou une offrande est nécessaire.</text:p>
      <text:p text:style-name="Standard">- Ancêtre qui donne quelque chose → don spirituel, transmission</text:p>
      <text:p text:style-name="Standard"><text:s text:c="35"/>d'un pouvoir ancestral.</text:p>
      <text:p text:style-name="Standard"><text:soft-page-break/>- Ancêtre qui vous appelle <text:s text:c="2"/>→ attention : si le rêveur est malade,</text:p>
      <text:p text:style-name="Standard"><text:s text:c="31"/>consulter immédiatement un houngan.</text:p>
      <text:p text:style-name="Standard"><text:s text:c="31"/>L'ancêtre peut appeler trop tôt.</text:p>
      <text:p text:style-name="Standard"/>
      <text:p text:style-name="Standard">SIGNIFICATION DANS LA TRADITION :</text:p>
      <text:p text:style-name="Standard">Les morts qui ont bien vécu rejoignent Ginen — le monde heureux</text:p>
      <text:p text:style-name="Standard">des ancêtres divins. Ils continuent de veiller sur leurs familles.</text:p>
      <text:p text:style-name="Standard">Négliger les ancêtres, c'est se couper de la protection la plus</text:p>
      <text:p text:style-name="Standard">ancienne et la plus puissante.</text:p>
      <text:p text:style-name="Standard"/>
      <text:p text:style-name="Standard">ACTION RITUELLE RECOMMANDÉE :</text:p>
      <text:p text:style-name="Standard">Préparer une petite table d'offrandes pour l'ancêtre : sa nourriture</text:p>
      <text:p text:style-name="Standard">préférée, de l'eau, une bougie blanche. Lui parler à voix haute.</text:p>
      <text:p text:style-name="Standard">Lui demander ce qu'il veut communiquer.</text:p>
      <text:p text:style-name="Standard"/>
      <text:p text:style-name="Standard"/>
      <text:p text:style-name="Standard">----------------------------------------------------------------</text:p>
      <text:p text:style-name="Standard">RÊVE #12 — UNE BELLE FEMME EN BLANC</text:p>
      <text:p text:style-name="Standard">----------------------------------------------------------------</text:p>
      <text:p text:style-name="Standard">LWA ASSOCIÉE <text:s/>: Erzulie Freda / Ayizan / Danbala (aspect féminin)</text:p>
      <text:p text:style-name="Standard">NANCHON <text:s text:c="6"/>: Rada</text:p>
      <text:p text:style-name="Standard"/>
      <text:p text:style-name="Standard">DESCRIPTION DU RÊVE :</text:p>
      <text:p text:style-name="Standard">Voir une femme extraordinairement belle vêtue de blanc ou de rose,</text:p>
      <text:p text:style-name="Standard">qui pleure ou qui sourit, portant des bijoux.</text:p>
      <text:p text:style-name="Standard"/>
      <text:p text:style-name="Standard">INTERPRÉTATION VODOU :</text:p>
      <text:p text:style-name="Standard">Erzulie Freda se manifeste souvent dans les rêves sous la forme</text:p>
      <text:p text:style-name="Standard">d'une femme d'une beauté surnaturelle. Ce rêve est à la fois</text:p>
      <text:p text:style-name="Standard">une bénédiction et un appel. Freda est la maîtresse de l'amour</text:p>
      <text:p text:style-name="Standard">romantique, du luxe et de la beauté — mais aussi de la douleur</text:p>
      <text:p text:style-name="Standard">de l'idéal jamais atteint.</text:p>
      <text:p text:style-name="Standard"/>
      <text:p text:style-name="Standard">NUANCES :</text:p>
      <text:p text:style-name="Standard">- Femme qui sourit et offre <text:s text:c="2"/>→ bénédiction d'Erzulie Freda.</text:p>
      <text:p text:style-name="Standard"><text:s text:c="32"/>Amour, beauté, abondance à venir.</text:p>
      <text:p text:style-name="Standard">- Femme qui pleure <text:s text:c="11"/>→ Freda pleure toujours, car le monde</text:p>
      <text:p text:style-name="Standard"><text:s text:c="32"/>ne peut jamais être à la hauteur de son</text:p>
      <text:p text:style-name="Standard"><text:s text:c="32"/>idéal. Ce rêve signale une déception</text:p>
      <text:p text:style-name="Standard"><text:s text:c="32"/>amoureuse à venir, ou une perte.</text:p>
      <text:p text:style-name="Standard">- Femme qui vous offre un bijou → Freda vous adopte comme son enfant.</text:p>
      <text:p text:style-name="Standard"><text:s text:c="34"/>Elle vous protège dans l'amour.</text:p>
      <text:p text:style-name="Standard">- Femme en bleu et or <text:s text:c="8"/>→ Ezili Dantò : protection maternelle</text:p>
      <text:p text:style-name="Standard"><text:s text:c="32"/>féroce, pas romantique.</text:p>
      <text:p text:style-name="Standard"/>
      <text:p text:style-name="Standard">ACTION RITUELLE RECOMMANDÉE :</text:p>
      <text:p text:style-name="Standard">Offrir à Erzulie Freda : parfum raffiné, gâteaux sucrés, roses</text:p>
      <text:p text:style-name="Standard">roses, bougie rose, champagne. Lui faire des compliments.</text:p>
      <text:p text:style-name="Standard"/>
      <text:p text:style-name="Standard"/>
      <text:p text:style-name="Standard">----------------------------------------------------------------</text:p>
      <text:p text:style-name="Standard">RÊVE #13 — UNE FEMME À LA PEAU SOMBRE AVEC UN COUTEAU</text:p>
      <text:p text:style-name="Standard"><text:soft-page-break/>----------------------------------------------------------------</text:p>
      <text:p text:style-name="Standard">LWA ASSOCIÉE <text:s/>: Ezili Dantò (Erzulie Dantor)</text:p>
      <text:p text:style-name="Standard">NANCHON <text:s text:c="6"/>: Petro</text:p>
      <text:p text:style-name="Standard"/>
      <text:p text:style-name="Standard">DESCRIPTION DU RÊVE :</text:p>
      <text:p text:style-name="Standard">Voir une femme forte à la peau sombre portant un enfant ou un</text:p>
      <text:p text:style-name="Standard">couteau, entendre des grognements, voir des cicatrices sur un</text:p>
      <text:p text:style-name="Standard">visage féminin.</text:p>
      <text:p text:style-name="Standard"/>
      <text:p text:style-name="Standard">INTERPRÉTATION VODOU :</text:p>
      <text:p text:style-name="Standard">Ezili Dantò se manifeste en rêve pour protéger — surtout les</text:p>
      <text:p text:style-name="Standard">femmes, les mères, les enfants. Elle est muette (on lui a coupé</text:p>
      <text:p text:style-name="Standard">la langue) mais sa présence en rêve est puissante. Elle dit</text:p>
      <text:p text:style-name="Standard">sans parler ce qui doit être dit.</text:p>
      <text:p text:style-name="Standard"/>
      <text:p text:style-name="Standard">NUANCES :</text:p>
      <text:p text:style-name="Standard">- Elle tient un enfant <text:s text:c="4"/>→ protection d'un enfant en danger.</text:p>
      <text:p text:style-name="Standard"><text:s text:c="29"/>Quelqu'un menace un être cher.</text:p>
      <text:p text:style-name="Standard">- Elle montre son couteau <text:s/>→ elle est prête à combattre pour vous.</text:p>
      <text:p text:style-name="Standard"><text:s text:c="29"/>Faites de même : défendez-vous.</text:p>
      <text:p text:style-name="Standard">- Elle pleure sans bruit <text:s text:c="2"/>→ injustice non réparée dans votre vie</text:p>
      <text:p text:style-name="Standard"><text:s text:c="29"/>ou votre famille.</text:p>
      <text:p text:style-name="Standard"/>
      <text:p text:style-name="Standard">ACTION RITUELLE RECOMMANDÉE :</text:p>
      <text:p text:style-name="Standard">Offrir à Dantò : crème de cacao, cochon sauvage symbolique,</text:p>
      <text:p text:style-name="Standard">bijoux d'or, bougie bleu et rouge. Lui confier ce qui vous oppresse.</text:p>
      <text:p text:style-name="Standard"/>
      <text:p text:style-name="Standard"/>
      <text:p text:style-name="Standard">----------------------------------------------------------------</text:p>
      <text:p text:style-name="Standard">RÊVE #14 — UN VIEILLARD AVEC UNE CANNE</text:p>
      <text:p text:style-name="Standard">----------------------------------------------------------------</text:p>
      <text:p text:style-name="Standard">LWA ASSOCIÉ <text:s text:c="2"/>: Papa Legba (aspect vieux)</text:p>
      <text:p text:style-name="Standard">NANCHON <text:s text:c="6"/>: Rada</text:p>
      <text:p text:style-name="Standard"/>
      <text:p text:style-name="Standard">DESCRIPTION DU RÊVE :</text:p>
      <text:p text:style-name="Standard">Voir un vieil homme qui boite, avec une canne, un chapeau de paille</text:p>
      <text:p text:style-name="Standard">ou un sac (djakout), parfois accompagné d'un chien.</text:p>
      <text:p text:style-name="Standard"/>
      <text:p text:style-name="Standard">INTERPRÉTATION VODOU :</text:p>
      <text:p text:style-name="Standard">C'est Papa Legba lui-même — non pas dans sa forme guerrière, mais</text:p>
      <text:p text:style-name="Standard">dans sa forme ancestrale de vieillard sage. Cette forme apparaît</text:p>
      <text:p text:style-name="Standard">quand il veut se faire reconnaître clairement. Sa présence en rêve</text:p>
      <text:p text:style-name="Standard">est la plus urgente qui soit : Legba ouvre les chemins. S'il se</text:p>
      <text:p text:style-name="Standard">présente, un chemin va s'ouvrir — ou se fermer.</text:p>
      <text:p text:style-name="Standard"/>
      <text:p text:style-name="Standard">NUANCES :</text:p>
      <text:p text:style-name="Standard">- Vieillard souriant qui ouvre une porte → chemin clair, nouveau</text:p>
      <text:p text:style-name="Standard"><text:s text:c="43"/>départ imminent.</text:p>
      <text:p text:style-name="Standard">- Vieillard qui hésite ou bloque <text:s text:c="9"/>→ un chemin n'est pas</text:p>
      <text:p text:style-name="Standard"><text:s text:c="44"/>encore prêt. Patienter.</text:p>
      <text:p text:style-name="Standard">- Vieillard au carrefour <text:s text:c="17"/>→ décision cruciale à faire.</text:p>
      <text:p text:style-name="Standard"><text:s text:c="44"/>Il attend votre choix.</text:p>
      <text:p text:style-name="Standard"><text:soft-page-break/></text:p>
      <text:p text:style-name="Standard">ACTION RITUELLE RECOMMANDÉE :</text:p>
      <text:p text:style-name="Standard">Offrir au carrefour à Papa Legba : café noir, rhum blanc, cacahuètes,</text:p>
      <text:p text:style-name="Standard">bougie jaune. Lui demander d'ouvrir le bon chemin.</text:p>
      <text:p text:style-name="Standard"/>
      <text:p text:style-name="Standard"/>
      <text:p text:style-name="Standard">----------------------------------------------------------------</text:p>
      <text:p text:style-name="Standard">RÊVE #15 — UN HOMME EN UNIFORME MILITAIRE OU ROUGE</text:p>
      <text:p text:style-name="Standard">----------------------------------------------------------------</text:p>
      <text:p text:style-name="Standard">LWA ASSOCIÉ <text:s text:c="2"/>: Ogou (famille)</text:p>
      <text:p text:style-name="Standard">NANCHON <text:s text:c="6"/>: Nago</text:p>
      <text:p text:style-name="Standard"/>
      <text:p text:style-name="Standard">DESCRIPTION DU RÊVE :</text:p>
      <text:p text:style-name="Standard">Voir un soldat, un général, un homme portant du rouge et du noir,</text:p>
      <text:p text:style-name="Standard">une machette ou une épée.</text:p>
      <text:p text:style-name="Standard"/>
      <text:p text:style-name="Standard">INTERPRÉTATION VODOU :</text:p>
      <text:p text:style-name="Standard">Ogou Feray — le général guerrier — se manifeste souvent en rêve</text:p>
      <text:p text:style-name="Standard">comme un homme en uniforme militaire ou portant les couleurs rouge</text:p>
      <text:p text:style-name="Standard">et noir. Sa présence annonce un combat à mener, une protection</text:p>
      <text:p text:style-name="Standard">accordée, ou un appel au leadership.</text:p>
      <text:p text:style-name="Standard"/>
      <text:p text:style-name="Standard">NUANCES :</text:p>
      <text:p text:style-name="Standard">- Soldat qui protège <text:s text:c="3"/>→ Ogou vous couvre. Vous êtes protégé</text:p>
      <text:p text:style-name="Standard"><text:s text:c="26"/>dans un conflit ou une épreuve.</text:p>
      <text:p text:style-name="Standard">- Soldat qui combat <text:s text:c="4"/>→ vous devez vous battre. Ne pas reculer.</text:p>
      <text:p text:style-name="Standard">- Homme en rouge triste → Ogou est déçu. Une bataille a été fuie.</text:p>
      <text:p text:style-name="Standard">- Machette offerte <text:s text:c="5"/>→ Ogou vous donne son arme. Il vous confie</text:p>
      <text:p text:style-name="Standard"><text:s text:c="26"/>sa force et sa justice.</text:p>
      <text:p text:style-name="Standard"/>
      <text:p text:style-name="Standard">ACTION RITUELLE RECOMMANDÉE :</text:p>
      <text:p text:style-name="Standard">Offrir à Ogou : rhum vieux, bougie rouge, cigare.</text:p>
      <text:p text:style-name="Standard">Lui demander la force et la protection dans votre combat.</text:p>
      <text:p text:style-name="Standard"/>
      <text:p text:style-name="Standard"/>
      <text:p text:style-name="Standard">----------------------------------------------------------------</text:p>
      <text:p text:style-name="Standard">RÊVE #16 — UNE SIRÈNE / FEMME DANS LA MER</text:p>
      <text:p text:style-name="Standard">----------------------------------------------------------------</text:p>
      <text:p text:style-name="Standard">LWA ASSOCIÉE <text:s/>: La Sirène (Lasirenn) / Agwé</text:p>
      <text:p text:style-name="Standard">NANCHON <text:s text:c="6"/>: Rada</text:p>
      <text:p text:style-name="Standard"/>
      <text:p text:style-name="Standard">DESCRIPTION DU RÊVE :</text:p>
      <text:p text:style-name="Standard">Voir une sirène, voir une femme sous l'eau qui vous appelle,</text:p>
      <text:p text:style-name="Standard">être emmené sous la mer, voir une femme tenant un miroir et un</text:p>
      <text:p text:style-name="Standard">peigne dans l'eau.</text:p>
      <text:p text:style-name="Standard"/>
      <text:p text:style-name="Standard">INTERPRÉTATION VODOU :</text:p>
      <text:p text:style-name="Standard">La Sirène est la reine des eaux haïtiennes. Elle est liée à la</text:p>
      <text:p text:style-name="Standard">musique, à la beauté, à la clairvoyance et à la fortune. Ce rêve</text:p>
      <text:p text:style-name="Standard">est souvent un appel initiatique — La Sirène choisit ses servants.</text:p>
      <text:p text:style-name="Standard"/>
      <text:p text:style-name="Standard">NUANCES :</text:p>
      <text:p text:style-name="Standard"><text:soft-page-break/>- Sirène qui appelle doucement → invitation dans son royaume.</text:p>
      <text:p text:style-name="Standard"><text:s text:c="33"/>Don de clairvoyance ou de musique.</text:p>
      <text:p text:style-name="Standard">- Être emmené sous l'eau <text:s text:c="5"/>→ La Sirène vous initie en rêve.</text:p>
      <text:p text:style-name="Standard"><text:s text:c="33"/>Certains reçoivent des guérisons</text:p>
      <text:p text:style-name="Standard"><text:s text:c="33"/>ou des connaissances pendant cette plongée.</text:p>
      <text:p text:style-name="Standard">- Femme avec miroir et peigne <text:s/>→ La Sirène révèle votre beauté</text:p>
      <text:p text:style-name="Standard"><text:s text:c="34"/>intérieure ou un don caché.</text:p>
      <text:p text:style-name="Standard">- Se noyer dans le rêve <text:s text:c="7"/>→ La Sirène est trop intense.</text:p>
      <text:p text:style-name="Standard"><text:s text:c="34"/>Consulter un praticien pour gérer</text:p>
      <text:p text:style-name="Standard"><text:s text:c="34"/>l'intensité de cette connexion.</text:p>
      <text:p text:style-name="Standard"/>
      <text:p text:style-name="Standard">ACTION RITUELLE RECOMMANDÉE :</text:p>
      <text:p text:style-name="Standard">Au bord de l'eau : offrir des fleurs bleues et blanches, du</text:p>
      <text:p text:style-name="Standard">champagne, des bijoux argentés. Chanter sur l'eau.</text:p>
      <text:p text:style-name="Standard"/>
      <text:p text:style-name="Standard"/>
      <text:p text:style-name="Standard">================================================================</text:p>
      <text:p text:style-name="Standard">SECTION IV — RÊVES D'ÉVÉNEMENTS ET DE SITUATIONS</text:p>
      <text:p text:style-name="Standard">================================================================</text:p>
      <text:p text:style-name="Standard"/>
      <text:p text:style-name="Standard"/>
      <text:p text:style-name="Standard">----------------------------------------------------------------</text:p>
      <text:p text:style-name="Standard">RÊVE #17 — VOLER / ÊTRE DANS LES AIRS</text:p>
      <text:p text:style-name="Standard">----------------------------------------------------------------</text:p>
      <text:p text:style-name="Standard">LWA ASSOCIÉS <text:s/>: Danbala / Loko / forces du vent</text:p>
      <text:p text:style-name="Standard">NANCHON <text:s text:c="6"/>: Rada</text:p>
      <text:p text:style-name="Standard"/>
      <text:p text:style-name="Standard">DESCRIPTION DU RÊVE :</text:p>
      <text:p text:style-name="Standard">Voler librement dans le ciel, planer au-dessus des maisons,</text:p>
      <text:p text:style-name="Standard">s'élever dans la lumière.</text:p>
      <text:p text:style-name="Standard"/>
      <text:p text:style-name="Standard">INTERPRÉTATION VODOU :</text:p>
      <text:p text:style-name="Standard">Voler en rêve est le signe que le Ti Bon Ange se libère et voyage.</text:p>
      <text:p text:style-name="Standard">Dans la tradition vodou, c'est une expérience spirituelle réelle</text:p>
      <text:p text:style-name="Standard">— l'âme sort du corps et monte vers le monde des esprits.</text:p>
      <text:p text:style-name="Standard"/>
      <text:p text:style-name="Standard">NUANCES :</text:p>
      <text:p text:style-name="Standard">- Voler librement dans la lumière → élévation spirituelle.</text:p>
      <text:p text:style-name="Standard"><text:s text:c="36"/>Le rêveur développe ses capacités.</text:p>
      <text:p text:style-name="Standard">- Voler sans contrôle <text:s text:c="12"/>→ des forces spirituelles non</text:p>
      <text:p text:style-name="Standard"><text:s text:c="36"/>maîtrisées sont actives.</text:p>
      <text:p text:style-name="Standard">- Voler au-dessus d'un lieu précis → les ancêtres ou lwa attirent</text:p>
      <text:p text:style-name="Standard"><text:s text:c="37"/>l'attention sur ce lieu.</text:p>
      <text:p text:style-name="Standard"/>
      <text:p text:style-name="Standard"/>
      <text:p text:style-name="Standard">----------------------------------------------------------------</text:p>
      <text:p text:style-name="Standard">RÊVE #18 — UN CARREFOUR</text:p>
      <text:p text:style-name="Standard">----------------------------------------------------------------</text:p>
      <text:p text:style-name="Standard">LWA ASSOCIÉ <text:s text:c="2"/>: Papa Legba / Kalfou</text:p>
      <text:p text:style-name="Standard">NANCHON <text:s text:c="6"/>: Rada / Petro</text:p>
      <text:p text:style-name="Standard"/>
      <text:p text:style-name="Standard">DESCRIPTION DU RÊVE :</text:p>
      <text:p text:style-name="Standard"><text:soft-page-break/>Se retrouver à un carrefour, ne pas savoir quelle direction</text:p>
      <text:p text:style-name="Standard">prendre, voir une croix tracée au sol.</text:p>
      <text:p text:style-name="Standard"/>
      <text:p text:style-name="Standard">INTERPRÉTATION VODOU :</text:p>
      <text:p text:style-name="Standard">Le carrefour est l'espace sacré de Papa Legba. Dans le vodou,</text:p>
      <text:p text:style-name="Standard">tout commence et tout finit au carrefour. Ce rêve annonce un</text:p>
      <text:p text:style-name="Standard">choix majeur, une bifurcation dans la vie du rêveur.</text:p>
      <text:p text:style-name="Standard"/>
      <text:p text:style-name="Standard">NUANCES :</text:p>
      <text:p text:style-name="Standard">- Carrefour de jour, chemin clair → Legba ouvre un chemin.</text:p>
      <text:p text:style-name="Standard"><text:s text:c="36"/>Suivre l'instinct. Confiance.</text:p>
      <text:p text:style-name="Standard">- Carrefour de nuit, brouillard <text:s text:c="2"/>→ Kalfou est présent. Attention</text:p>
      <text:p text:style-name="Standard"><text:s text:c="36"/>aux décisions prises dans l'ombre.</text:p>
      <text:p text:style-name="Standard"><text:s text:c="36"/>Danger d'un mauvais choix.</text:p>
      <text:p text:style-name="Standard">- Croix tracée sur la terre <text:s text:c="6"/>→ présence active de Legba.</text:p>
      <text:p text:style-name="Standard"><text:s text:c="36"/>Il a tracé le chemin. Suivre.</text:p>
      <text:p text:style-name="Standard"/>
      <text:p text:style-name="Standard">ACTION RITUELLE RECOMMANDÉE :</text:p>
      <text:p text:style-name="Standard">Aller à un vrai carrefour tôt le matin. Offrir à Legba.</text:p>
      <text:p text:style-name="Standard">Lui demander d'indiquer le bon chemin.</text:p>
      <text:p text:style-name="Standard"/>
      <text:p text:style-name="Standard"/>
      <text:p text:style-name="Standard">----------------------------------------------------------------</text:p>
      <text:p text:style-name="Standard">RÊVE #19 — UNE CÉRÉMONIE VODOU / DES TAMBOURS</text:p>
      <text:p text:style-name="Standard">----------------------------------------------------------------</text:p>
      <text:p text:style-name="Standard">LWA ASSOCIÉS <text:s/>: Tous les lwa — selon ce qui se passe dans le rêve</text:p>
      <text:p text:style-name="Standard">NANCHON <text:s text:c="6"/>: Toutes nanchons</text:p>
      <text:p text:style-name="Standard"/>
      <text:p text:style-name="Standard">DESCRIPTION DU RÊVE :</text:p>
      <text:p text:style-name="Standard">Assister à une cérémonie, entendre des tambours sacrés, voir</text:p>
      <text:p text:style-name="Standard">un péristyle illuminé, participer à un rituel.</text:p>
      <text:p text:style-name="Standard"/>
      <text:p text:style-name="Standard">INTERPRÉTATION VODOU :</text:p>
      <text:p text:style-name="Standard">Ce rêve est l'un des plus significatifs. Le rêveur est</text:p>
      <text:p text:style-name="Standard">littéralement emmené dans une cérémonie spirituelle pendant son</text:p>
      <text:p text:style-name="Standard">sommeil — son Ti Bon Ange assiste à un vrai service spirituel.</text:p>
      <text:p text:style-name="Standard"/>
      <text:p text:style-name="Standard">NUANCES :</text:p>
      <text:p text:style-name="Standard">- Assister sans participer <text:s/>→ invitation : les lwa veulent que</text:p>
      <text:p text:style-name="Standard"><text:s text:c="30"/>le rêveur s'engage dans la tradition.</text:p>
      <text:p text:style-name="Standard">- Participer activement <text:s text:c="4"/>→ initiation déjà commencée. Un lwa</text:p>
      <text:p text:style-name="Standard"><text:s text:c="30"/>commence à travailler avec le rêveur.</text:p>
      <text:p text:style-name="Standard">- Danser dans la cérémonie → possession symbolique. Un lwa cherche</text:p>
      <text:p text:style-name="Standard"><text:s text:c="30"/>à s'exprimer à travers le rêveur.</text:p>
      <text:p text:style-name="Standard">- Recevoir l'ason en rêve <text:s/>→ appel sacerdotal direct. Consulter</text:p>
      <text:p text:style-name="Standard"><text:s text:c="30"/>immédiatement un houngan.</text:p>
      <text:p text:style-name="Standard"/>
      <text:p text:style-name="Standard">ACTION RITUELLE RECOMMANDÉE :</text:p>
      <text:p text:style-name="Standard">Assister à une vraie cérémonie vodou si possible. Faire brûler</text:p>
      <text:p text:style-name="Standard">une bougie blanche et parler aux lwa de ce rêve.</text:p>
      <text:p text:style-name="Standard"/>
      <text:p text:style-name="Standard"/>
      <text:p text:style-name="Standard"><text:soft-page-break/>----------------------------------------------------------------</text:p>
      <text:p text:style-name="Standard">RÊVE #20 — UN MARIAGE</text:p>
      <text:p text:style-name="Standard">----------------------------------------------------------------</text:p>
      <text:p text:style-name="Standard">LWA ASSOCIÉS <text:s/>: Erzulie Freda / Danbala / Ogou / Agwé</text:p>
      <text:p text:style-name="Standard">NANCHON <text:s text:c="6"/>: Rada</text:p>
      <text:p text:style-name="Standard"/>
      <text:p text:style-name="Standard">DESCRIPTION DU RÊVE :</text:p>
      <text:p text:style-name="Standard">Se marier avec un inconnu ou une inconnue, voir des anneaux,</text:p>
      <text:p text:style-name="Standard">participer à une cérémonie de mariage mystérieuse.</text:p>
      <text:p text:style-name="Standard"/>
      <text:p text:style-name="Standard">INTERPRÉTATION VODOU :</text:p>
      <text:p text:style-name="Standard">Dans la tradition vodou, le mariage mystique (maryaj lwa) est</text:p>
      <text:p text:style-name="Standard">une pratique réelle et importante. Un lwa peut choisir un</text:p>
      <text:p text:style-name="Standard">serviteur comme époux ou épouse spirituel. Ce choix se manifeste</text:p>
      <text:p text:style-name="Standard">souvent d'abord par un rêve de mariage.</text:p>
      <text:p text:style-name="Standard"/>
      <text:p text:style-name="Standard">NUANCES :</text:p>
      <text:p text:style-name="Standard">- Mariage avec un bel inconnu noble <text:s/>→ appel au mariage mystique.</text:p>
      <text:p text:style-name="Standard"><text:s text:c="39"/>Un lwa vous choisit.</text:p>
      <text:p text:style-name="Standard">- Se marier dans l'eau <text:s text:c="14"/>→ La Sirène ou Agwé vous appelle.</text:p>
      <text:p text:style-name="Standard">- Mariage avec une femme en blanc <text:s text:c="3"/>→ Erzulie Freda vous veut comme</text:p>
      <text:p text:style-name="Standard"><text:s text:c="39"/>époux mystique.</text:p>
      <text:p text:style-name="Standard">- Mariage forcé ou angoissant <text:s text:c="7"/>→ un lwa est insistant et n'a pas</text:p>
      <text:p text:style-name="Standard"><text:s text:c="39"/>été entendu. Il exprime son désir</text:p>
      <text:p text:style-name="Standard"><text:s text:c="39"/>de façon pressante.</text:p>
      <text:p text:style-name="Standard"/>
      <text:p text:style-name="Standard">SIGNIFICATION PROFONDE :</text:p>
      <text:p text:style-name="Standard">Le mariage mystique avec un lwa crée une relation permanente.</text:p>
      <text:p text:style-name="Standard">Le lwa devient le compagnon principal du servant. Il demande</text:p>
      <text:p text:style-name="Standard">fidélité, honneurs et célibat physique certains jours de la semaine.</text:p>
      <text:p text:style-name="Standard"/>
      <text:p text:style-name="Standard">ACTION RITUELLE RECOMMANDÉE :</text:p>
      <text:p text:style-name="Standard">Consulter absolument un houngan ou une manbo. Ce rêve ne doit</text:p>
      <text:p text:style-name="Standard">jamais être interprété seul. Il peut précéder une initiation</text:p>
      <text:p text:style-name="Standard">formelle au mariage mystique.</text:p>
      <text:p text:style-name="Standard"/>
      <text:p text:style-name="Standard"/>
      <text:p text:style-name="Standard">----------------------------------------------------------------</text:p>
      <text:p text:style-name="Standard">RÊVE #21 — LA MORT / UNE MORT</text:p>
      <text:p text:style-name="Standard">----------------------------------------------------------------</text:p>
      <text:p text:style-name="Standard">LWA ASSOCIÉS <text:s/>: Baron Samedi / Famille Gede / Ancêtres</text:p>
      <text:p text:style-name="Standard">NANCHON <text:s text:c="6"/>: Gede</text:p>
      <text:p text:style-name="Standard"/>
      <text:p text:style-name="Standard">DESCRIPTION DU RÊVE :</text:p>
      <text:p text:style-name="Standard">Voir quelqu'un mourir, assister à un enterrement, voir son</text:p>
      <text:p text:style-name="Standard">propre corps mort, être entouré de morts.</text:p>
      <text:p text:style-name="Standard"/>
      <text:p text:style-name="Standard">INTERPRÉTATION VODOU :</text:p>
      <text:p text:style-name="Standard">Dans la tradition vodou, rêver de mort n'est PAS un présage</text:p>
      <text:p text:style-name="Standard">de mort physique. C'est presque toujours le signe d'une</text:p>
      <text:p text:style-name="Standard">transformation — un cycle qui se termine pour qu'un autre</text:p>
      <text:p text:style-name="Standard">commence. Comme dans l'initiation Kanzò : on meurt pour renaître.</text:p>
      <text:p text:style-name="Standard"><text:soft-page-break/></text:p>
      <text:p text:style-name="Standard">NUANCES :</text:p>
      <text:p text:style-name="Standard">- Voir sa propre mort <text:s text:c="5"/>→ transformation profonde à venir.</text:p>
      <text:p text:style-name="Standard"><text:s text:c="29"/>La personne que vous êtes doit "mourir"</text:p>
      <text:p text:style-name="Standard"><text:s text:c="29"/>pour laisser place à votre vraie nature.</text:p>
      <text:p text:style-name="Standard">- Mort d'un proche <text:s text:c="8"/>→ fin d'une phase dans cette relation.</text:p>
      <text:p text:style-name="Standard"><text:s text:c="29"/>Ou protection : Baron a décidé que</text:p>
      <text:p text:style-name="Standard"><text:s text:c="29"/>ce moment n'est pas venu.</text:p>
      <text:p text:style-name="Standard">- Enterrement serein <text:s text:c="6"/>→ un ancêtre est bien enterré, en paix à Ginen.</text:p>
      <text:p text:style-name="Standard">- Mort violente en rêve <text:s text:c="3"/>→ une situation doit être résolue</text:p>
      <text:p text:style-name="Standard"><text:s text:c="29"/>de toute urgence. Blocage sérieux.</text:p>
      <text:p text:style-name="Standard"/>
      <text:p text:style-name="Standard">SIGNIFICATION PROFONDE :</text:p>
      <text:p text:style-name="Standard">Baron Samedi décide qui peut mourir et qui doit vivre.</text:p>
      <text:p text:style-name="Standard">Dans l'initiation Kanzò, "mouri pou resisite" (mourir pour</text:p>
      <text:p text:style-name="Standard">ressusciter) est le principe fondamental. La mort en rêve est</text:p>
      <text:p text:style-name="Standard">donc souvent une bénédiction initiatique.</text:p>
      <text:p text:style-name="Standard"/>
      <text:p text:style-name="Standard"/>
      <text:p text:style-name="Standard">----------------------------------------------------------------</text:p>
      <text:p text:style-name="Standard">RÊVE #22 — UN PONT / UNE PORTE</text:p>
      <text:p text:style-name="Standard">----------------------------------------------------------------</text:p>
      <text:p text:style-name="Standard">LWA ASSOCIÉ <text:s text:c="2"/>: Papa Legba / Kalfou</text:p>
      <text:p text:style-name="Standard">NANCHON <text:s text:c="6"/>: Rada / Petro</text:p>
      <text:p text:style-name="Standard"/>
      <text:p text:style-name="Standard">DESCRIPTION DU RÊVE :</text:p>
      <text:p text:style-name="Standard">Traverser un pont, franchir une porte, voir une porte close ou</text:p>
      <text:p text:style-name="Standard">ouverte, être bloqué devant une barrière.</text:p>
      <text:p text:style-name="Standard"/>
      <text:p text:style-name="Standard">INTERPRÉTATION VODOU :</text:p>
      <text:p text:style-name="Standard">Legba est le maître des portes et des passages. Chaque porte</text:p>
      <text:p text:style-name="Standard">en rêve est sa signature. Ce rêve parle des passages dans la vie</text:p>
      <text:p text:style-name="Standard">du rêveur — ce qui peut ou ne peut pas encore être traversé.</text:p>
      <text:p text:style-name="Standard"/>
      <text:p text:style-name="Standard">NUANCES :</text:p>
      <text:p text:style-name="Standard">- Porte grande ouverte <text:s/>→ Legba a accordé le passage. Le moment est venu.</text:p>
      <text:p text:style-name="Standard">- Porte fermée à clé <text:s text:c="3"/>→ le chemin n'est pas encore prêt.</text:p>
      <text:p text:style-name="Standard"><text:s text:c="26"/>Quelque chose doit être fait avant.</text:p>
      <text:p text:style-name="Standard">- Pont fragile <text:s text:c="9"/>→ transition risquée. Prudence dans le changement.</text:p>
      <text:p text:style-name="Standard">- Pont solide et lumineux → transition protégée, sécurisée.</text:p>
      <text:p text:style-name="Standard"/>
      <text:p text:style-name="Standard"/>
      <text:p text:style-name="Standard">----------------------------------------------------------------</text:p>
      <text:p text:style-name="Standard">RÊVE #23 — DES FLEURS</text:p>
      <text:p text:style-name="Standard">----------------------------------------------------------------</text:p>
      <text:p text:style-name="Standard">LWA ASSOCIÉE <text:s/>: Erzulie Freda</text:p>
      <text:p text:style-name="Standard">NANCHON <text:s text:c="6"/>: Rada</text:p>
      <text:p text:style-name="Standard"/>
      <text:p text:style-name="Standard">DESCRIPTION DU RÊVE :</text:p>
      <text:p text:style-name="Standard">Voir un jardin fleuri, recevoir des fleurs, voir des roses,</text:p>
      <text:p text:style-name="Standard">être entouré de parfums floraux.</text:p>
      <text:p text:style-name="Standard"/>
      <text:p text:style-name="Standard"><text:soft-page-break/>INTERPRÉTATION VODOU :</text:p>
      <text:p text:style-name="Standard">Les fleurs sont la signature d'Erzulie Freda — lwa de l'amour,</text:p>
      <text:p text:style-name="Standard">de la beauté et du luxe. Ce rêve est parmi les plus doux et</text:p>
      <text:p text:style-name="Standard">bienveillants de la tradition.</text:p>
      <text:p text:style-name="Standard"/>
      <text:p text:style-name="Standard">NUANCES :</text:p>
      <text:p text:style-name="Standard">- Fleurs roses et blanches en abondance → bénédiction d'Erzulie.</text:p>
      <text:p text:style-name="Standard"><text:s text:c="42"/>Amour et beauté à venir.</text:p>
      <text:p text:style-name="Standard">- Fleurs qui se fanent <text:s text:c="12"/>→ déception amoureuse ou perte</text:p>
      <text:p text:style-name="Standard"><text:s text:c="37"/>d'une beauté passagère.</text:p>
      <text:p text:style-name="Standard">- Recevoir un bouquet <text:s text:c="13"/>→ quelqu'un vous aime sincèrement.</text:p>
      <text:p text:style-name="Standard"><text:s text:c="37"/>Ou Erzulie vous fait un cadeau.</text:p>
      <text:p text:style-name="Standard"/>
      <text:p text:style-name="Standard"/>
      <text:p text:style-name="Standard">----------------------------------------------------------------</text:p>
      <text:p text:style-name="Standard">RÊVE #24 — UNE MONTAGNE / UN LIEU ÉLEVÉ</text:p>
      <text:p text:style-name="Standard">----------------------------------------------------------------</text:p>
      <text:p text:style-name="Standard">LWA ASSOCIÉS <text:s/>: Ogou (montagne) / Azaka (terre, campagne)</text:p>
      <text:p text:style-name="Standard">NANCHON <text:s text:c="6"/>: Nago / Rada</text:p>
      <text:p text:style-name="Standard"/>
      <text:p text:style-name="Standard">DESCRIPTION DU RÊVE :</text:p>
      <text:p text:style-name="Standard">Gravir une montagne, voir un paysage montagneux, se retrouver</text:p>
      <text:p text:style-name="Standard">au sommet, ou dans les champs et jardins.</text:p>
      <text:p text:style-name="Standard"/>
      <text:p text:style-name="Standard">INTERPRÉTATION VODOU :</text:p>
      <text:p text:style-name="Standard">La montagne est associée à l'effort, à la conquête, au dépassement</text:p>
      <text:p text:style-name="Standard">de soi. Ogou combat sur les hauteurs. Azaka, le paysan, travaille</text:p>
      <text:p text:style-name="Standard">la terre des montagnes haïtiennes.</text:p>
      <text:p text:style-name="Standard"/>
      <text:p text:style-name="Standard">NUANCES :</text:p>
      <text:p text:style-name="Standard">- Arriver au sommet <text:s text:c="5"/>→ victoire à venir après un effort soutenu.</text:p>
      <text:p text:style-name="Standard"><text:s text:c="27"/>Ogou vous soutient.</text:p>
      <text:p text:style-name="Standard">- Bloquer à mi-chemin <text:s text:c="3"/>→ l'effort est réel mais quelque chose</text:p>
      <text:p text:style-name="Standard"><text:s text:c="27"/>spirituellement bloque la progression.</text:p>
      <text:p text:style-name="Standard">- Jardins en fleurs en montagne → Azaka bénit vos efforts de travail.</text:p>
      <text:p text:style-name="Standard"><text:s text:c="34"/>Abondance agricole ou professionnelle.</text:p>
      <text:p text:style-name="Standard"/>
      <text:p text:style-name="Standard"/>
      <text:p text:style-name="Standard">----------------------------------------------------------------</text:p>
      <text:p text:style-name="Standard">RÊVE #25 — DES JUMEAUX / DES ENFANTS EN PAIRE</text:p>
      <text:p text:style-name="Standard">----------------------------------------------------------------</text:p>
      <text:p text:style-name="Standard">LWA ASSOCIÉS <text:s/>: Marassa Dosou Dosa</text:p>
      <text:p text:style-name="Standard">NANCHON <text:s text:c="6"/>: Rada</text:p>
      <text:p text:style-name="Standard"/>
      <text:p text:style-name="Standard">DESCRIPTION DU RÊVE :</text:p>
      <text:p text:style-name="Standard">Voir des jumeaux, voir deux enfants identiques, voir deux objets</text:p>
      <text:p text:style-name="Standard">exactement pareils, être soi-même dédoublé.</text:p>
      <text:p text:style-name="Standard"/>
      <text:p text:style-name="Standard">INTERPRÉTATION VODOU :</text:p>
      <text:p text:style-name="Standard">Les Marassa sont les jumeaux divins du panthéon vodou. Ils</text:p>
      <text:p text:style-name="Standard">symbolisent la dualité sacrée, la puissance de la paire. Ce rêve</text:p>
      <text:p text:style-name="Standard">est rare et très significatif — les Marassa se sont manifestés.</text:p>
      <text:p text:style-name="Standard"><text:soft-page-break/></text:p>
      <text:p text:style-name="Standard">NUANCES :</text:p>
      <text:p text:style-name="Standard">- Jumeaux souriants <text:s text:c="6"/>→ bénédiction des Marassa. Équilibre,</text:p>
      <text:p text:style-name="Standard"><text:s text:c="28"/>joie et prospérité à venir.</text:p>
      <text:p text:style-name="Standard">- Jumeaux séparés ou tristes → une paire importante est brisée.</text:p>
      <text:p text:style-name="Standard"><text:s text:c="31"/>Un déséquilibre à corriger.</text:p>
      <text:p text:style-name="Standard">- Être soi-même dédoublé <text:s text:c="2"/>→ le rêveur a un lien direct avec les</text:p>
      <text:p text:style-name="Standard"><text:s text:c="30"/>Marassa. Les honorer est urgent.</text:p>
      <text:p text:style-name="Standard"/>
      <text:p text:style-name="Standard">ACTION RITUELLE RECOMMANDÉE :</text:p>
      <text:p text:style-name="Standard">Offrir aux Marassa en double ou triple quantité : deux assiettes</text:p>
      <text:p text:style-name="Standard">identiques, deux bougies, deux sucreries. NE JAMAIS offrir l'une</text:p>
      <text:p text:style-name="Standard">sans l'autre.</text:p>
      <text:p text:style-name="Standard"/>
      <text:p text:style-name="Standard"/>
      <text:p text:style-name="Standard">================================================================</text:p>
      <text:p text:style-name="Standard">TABLEAU RÉCAPITULATIF — RÊVE → LWA → SIGNIFICATION</text:p>
      <text:p text:style-name="Standard">================================================================</text:p>
      <text:p text:style-name="Standard"/>
      <text:p text:style-name="Standard">RÊVE <text:s text:c="17"/>| LWA PRINCIPAL <text:s text:c="3"/>| SIGNIFICATION ESSENTIELLE</text:p>
      <text:p text:style-name="Standard">----------------------|------------------|---------------------------</text:p>
      <text:p text:style-name="Standard">Serpent blanc <text:s text:c="8"/>| Danbala Wedo <text:s text:c="4"/>| Sagesse, transformation, renouveau</text:p>
      <text:p text:style-name="Standard">Arc-en-ciel <text:s text:c="10"/>| Ayida Wedo <text:s text:c="6"/>| Harmonie, fertilité, création</text:p>
      <text:p text:style-name="Standard">Eau calme profonde <text:s text:c="3"/>| Agwé / La Sirène | Voyage spirituel, abondance</text:p>
      <text:p text:style-name="Standard">Rivière ou source <text:s text:c="4"/>| Simbi <text:s text:c="11"/>| Guérison, clairvoyance</text:p>
      <text:p text:style-name="Standard">Feu de forge <text:s text:c="9"/>| Ogou Feray <text:s text:c="6"/>| Combat, transformation, force</text:p>
      <text:p text:style-name="Standard">Vieillard à la canne <text:s/>| Papa Legba <text:s text:c="6"/>| Chemin à ouvrir, décision clé</text:p>
      <text:p text:style-name="Standard">Carrefour <text:s text:c="12"/>| Legba / Kalfou <text:s text:c="2"/>| Choix majeur, passage</text:p>
      <text:p text:style-name="Standard">Cimetière <text:s text:c="12"/>| Baron Samedi <text:s text:c="4"/>| Transformation, message des morts</text:p>
      <text:p text:style-name="Standard">Ancêtre mort <text:s text:c="9"/>| Gede / Zansèt <text:s text:c="3"/>| Message urgent, honorer les morts</text:p>
      <text:p text:style-name="Standard">Belle femme en blanc <text:s/>| Erzulie Freda <text:s text:c="3"/>| Amour, beauté, bénédiction</text:p>
      <text:p text:style-name="Standard">Femme avec couteau <text:s text:c="3"/>| Ezili Dantò <text:s text:c="5"/>| Protection maternelle, combat</text:p>
      <text:p text:style-name="Standard">Homme en rouge/épée <text:s text:c="2"/>| Ogou <text:s text:c="12"/>| Protection guerrière, leadership</text:p>
      <text:p text:style-name="Standard">Sirène dans l'eau <text:s text:c="4"/>| La Sirène <text:s text:c="7"/>| Don de clairvoyance, initiation</text:p>
      <text:p text:style-name="Standard">Grand arbre <text:s text:c="10"/>| Gran Bwa / Loko <text:s/>| Ancrage, sagesse des plantes</text:p>
      <text:p text:style-name="Standard">Palmier royal <text:s text:c="8"/>| Ayizan <text:s text:c="10"/>| Initiation, protection sacerdotale</text:p>
      <text:p text:style-name="Standard">Cheval <text:s text:c="15"/>| Legba / Ogou <text:s text:c="4"/>| Appel d'un lwa, possession prochaine</text:p>
      <text:p text:style-name="Standard">Chien à un carrefour <text:s/>| Papa Legba <text:s text:c="6"/>| Nouveau chemin, décision urgente</text:p>
      <text:p text:style-name="Standard">Mariage mystérieux <text:s text:c="3"/>| Erzulie / Danbala| Mariage mystique avec un lwa</text:p>
      <text:p text:style-name="Standard">Mort propre <text:s text:c="10"/>| Baron Samedi <text:s text:c="4"/>| Transformation, fin d'un cycle</text:p>
      <text:p text:style-name="Standard">Voler / planer <text:s text:c="7"/>| Danbala / Loko <text:s text:c="2"/>| Élévation spirituelle, voyage âme</text:p>
      <text:p text:style-name="Standard">Fleurs roses <text:s text:c="9"/>| Erzulie Freda <text:s text:c="3"/>| Amour, douceur, bénédiction</text:p>
      <text:p text:style-name="Standard">Tambours / cérémonie <text:s/>| Tous les lwa <text:s text:c="4"/>| Appel à s'engager dans la tradition</text:p>
      <text:p text:style-name="Standard">Jumeaux <text:s text:c="14"/>| Marassa <text:s text:c="9"/>| Équilibre, dualité sacrée</text:p>
      <text:p text:style-name="Standard">Porte / pont <text:s text:c="9"/>| Papa Legba <text:s text:c="6"/>| Passage, transition dans la vie</text:p>
      <text:p text:style-name="Standard">Taureau puissant <text:s text:c="5"/>| Bossou / Agaou <text:s text:c="2"/>| Protection royale, force brute</text:p>
      <text:p text:style-name="Standard"/>
      <text:p text:style-name="Standard"/>
      <text:p text:style-name="Standard">================================================================</text:p>
      <text:p text:style-name="Standard">RÈGLES D'OR DE L'INTERPRÉTATION ONIRIQUE VODOU</text:p>
      <text:p text:style-name="Standard">================================================================</text:p>
      <text:p text:style-name="Standard"/>
      <text:p text:style-name="Standard"><text:soft-page-break/>1. NOTER IMMÉDIATEMENT : Écrire le rêve dès le réveil.</text:p>
      <text:p text:style-name="Standard"><text:s text:c="3"/>Les détails (couleur, sentiment, paroles entendues) sont</text:p>
      <text:p text:style-name="Standard"><text:s text:c="3"/>essentiels pour l'interprétation précise.</text:p>
      <text:p text:style-name="Standard"/>
      <text:p text:style-name="Standard">2. CONTEXTE PERSONNEL : Le même symbole peut signifier</text:p>
      <text:p text:style-name="Standard"><text:s text:c="3"/>des choses différentes selon la situation de vie du rêveur.</text:p>
      <text:p text:style-name="Standard"><text:s text:c="3"/>Un serpent ne dit pas la même chose à un initié et à quelqu'un</text:p>
      <text:p text:style-name="Standard"><text:s text:c="3"/>qui n'a aucune relation avec les lwa.</text:p>
      <text:p text:style-name="Standard"/>
      <text:p text:style-name="Standard">3. RÊVES RÉCURRENTS : Un rêve qui revient plusieurs fois est</text:p>
      <text:p text:style-name="Standard"><text:s text:c="3"/>un appel urgent. Le lwa n'a pas été entendu la première fois.</text:p>
      <text:p text:style-name="Standard"/>
      <text:p text:style-name="Standard">4. COULEURS ET SENTIMENTS : Les couleurs dans le rêve</text:p>
      <text:p text:style-name="Standard"><text:s text:c="3"/>révèlent le lwa (voir le tableau des couleurs des lwa).</text:p>
      <text:p text:style-name="Standard"><text:s text:c="3"/>Le sentiment dominant (paix, peur, joie, urgence) indique</text:p>
      <text:p text:style-name="Standard"><text:s text:c="3"/>si le message est une bénédiction ou un avertissement.</text:p>
      <text:p text:style-name="Standard"/>
      <text:p text:style-name="Standard">5. CONSULTER UN HOUNGAN OU UNE MANBO : Pour tout rêve</text:p>
      <text:p text:style-name="Standard"><text:s text:c="3"/>majeur (mariage, mort, cérémonie, ancêtre parlant), la</text:p>
      <text:p text:style-name="Standard"><text:s text:c="3"/>consultation d'un praticien initié est indispensable.</text:p>
      <text:p text:style-name="Standard"><text:s text:c="3"/>L'interprétation seule peut mener à des erreurs.</text:p>
      <text:p text:style-name="Standard"/>
      <text:p text:style-name="Standard">6. RÉPONDRE AU MESSAGE : Un rêve non honoré peut devenir</text:p>
      <text:p text:style-name="Standard"><text:s text:c="3"/>une maladie, un blocage ou une série de malchances.</text:p>
      <text:p text:style-name="Standard"><text:s text:c="3"/>Les lwa et ancêtres communiquent pour être entendus, pas ignorés.</text:p>
      <text:p text:style-name="Standard"/>
      <text:p text:style-name="Standard">7. RÊVES ET INITIATION : Les rêves sont souvent le premier</text:p>
      <text:p text:style-name="Standard"><text:s text:c="3"/>canal par lequel les lwa "choisissent" leur servant. Beaucoup</text:p>
      <text:p text:style-name="Standard"><text:s text:c="3"/>d'ounoans et de manbos racontent avoir reçu leur vocation</text:p>
      <text:p text:style-name="Standard"><text:s text:c="3"/>en rêve avant toute initiation formelle.</text:p>
      <text:p text:style-name="Standard"/>
      <text:p text:style-name="Standard">================================================================</text:p>
      <text:p text:style-name="Standard">FIN DU DOCUMENT</text:p>
      <text:p text:style-name="Standard">25 rêves interprétés · Tradition orale vodou haïtien</text:p>
      <text:p text:style-name="Standard">================================================================</text:p>
      <text:p text:style-name="Standard"/>
      <text:p text:style-name="Standard"/>
      <text:p text:style-name="Standard">================================================================</text:p>
      <text:p text:style-name="Standard">SECTION V — RÊVES SPÉCIAUX : CHANCE, ÂME, PROTECTION, APPEL</text:p>
      <text:p text:style-name="Standard">================================================================</text:p>
      <text:p text:style-name="Standard"/>
      <text:p text:style-name="Standard"/>
      <text:p text:style-name="Standard">----------------------------------------------------------------</text:p>
      <text:p text:style-name="Standard">RÊVE #26 — LA LOTERIE / BORLETTE / TCHALA</text:p>
      <text:p text:style-name="Standard">----------------------------------------------------------------</text:p>
      <text:p text:style-name="Standard">LWA ASSOCIÉS <text:s/>: Azaka / Papa Legba / Erzulie Freda / Baron Samedi</text:p>
      <text:p text:style-name="Standard">NANCHON <text:s text:c="6"/>: Rada / Gede</text:p>
      <text:p text:style-name="Standard"/>
      <text:p text:style-name="Standard">DESCRIPTION DU RÊVE :</text:p>
      <text:p text:style-name="Standard">Voir des numéros, rêver d'argent, de billets, de chiffres lumineux,</text:p>
      <text:p text:style-name="Standard">voir une loterie ou une borlette, rêver qu'on gagne.</text:p>
      <text:p text:style-name="Standard"/>
      <text:p text:style-name="Standard"><text:soft-page-break/>INTERPRÉTATION VODOU — LE TCHALA :</text:p>
      <text:p text:style-name="Standard">Dans la culture vodou haïtienne, le Tchala est un système sacré</text:p>
      <text:p text:style-name="Standard">d'interprétation des rêves permettant de déduire des numéros de</text:p>
      <text:p text:style-name="Standard">borlette. Chaque symbole vu en rêve correspond à un ou plusieurs</text:p>
      <text:p text:style-name="Standard">numéros. "Rèv ou se chans ou" — ton rêve est ta chance.</text:p>
      <text:p text:style-name="Standard"/>
      <text:p text:style-name="Standard">Le Tchala reconnaît que les lwa utilisent les rêves non seulement</text:p>
      <text:p text:style-name="Standard">pour guider spirituellement, mais aussi pour accorder des faveurs</text:p>
      <text:p text:style-name="Standard">matérielles à leurs servants fidèles. Un rêve de borlette est</text:p>
      <text:p text:style-name="Standard">une grâce accordée — mais elle teste aussi la sagesse du rêveur.</text:p>
      <text:p text:style-name="Standard"/>
      <text:p text:style-name="Standard">CORRESPONDANCES TCHALA (symboles → numéros) :</text:p>
      <text:p text:style-name="Standard">- Coq <text:s text:c="9"/>→ 11</text:p>
      <text:p text:style-name="Standard">- Dieu <text:s text:c="8"/>→ 33</text:p>
      <text:p text:style-name="Standard">- Maison (kay) → 09 ou 90</text:p>
      <text:p text:style-name="Standard">- Blanc <text:s text:c="7"/>→ 03 ou 30</text:p>
      <text:p text:style-name="Standard">- Mer / étranger → 87 ou 78</text:p>
      <text:p text:style-name="Standard">- Mort <text:s text:c="8"/>→ 08 ou 80</text:p>
      <text:p text:style-name="Standard">- Cochon <text:s text:c="6"/>→ 32 ou 23</text:p>
      <text:p text:style-name="Standard">- Arbre <text:s text:c="7"/>→ 06 ou 60</text:p>
      <text:p text:style-name="Standard">- Deux animaux ensemble → jouer en "mariage" (paire de numéros)</text:p>
      <text:p text:style-name="Standard"/>
      <text:p text:style-name="Standard">NUANCES SELON LE RÊVE :</text:p>
      <text:p text:style-name="Standard">- Voir des numéros directement → les lwa vous donnent les numéros.</text:p>
      <text:p text:style-name="Standard"><text:s text:c="34"/>C'est la forme la plus directe du Tchala.</text:p>
      <text:p text:style-name="Standard">- Recevoir de l'argent en rêve <text:s/>→ abondance à venir. Erzulie Freda</text:p>
      <text:p text:style-name="Standard"><text:s text:c="34"/>ou Azaka vous bénissent.</text:p>
      <text:p text:style-name="Standard">- Trouver de l'argent par terre → richesse soudaine et inattendue.</text:p>
      <text:p text:style-name="Standard"><text:s text:c="34"/>Un lwa dépose une offrande sur votre chemin.</text:p>
      <text:p text:style-name="Standard">- Perdre de l'argent en rêve <text:s text:c="3"/>→ avertissement. Une perte financière</text:p>
      <text:p text:style-name="Standard"><text:s text:c="34"/>réelle est possible si on n'est pas prudent.</text:p>
      <text:p text:style-name="Standard"><text:s text:c="34"/>Offrir à Azaka pour protéger ses finances.</text:p>
      <text:p text:style-name="Standard">- Compter de l'argent <text:s text:c="10"/>→ une transaction ou un accord financier</text:p>
      <text:p text:style-name="Standard"><text:s text:c="34"/>se présente. Le dénombrement dit combien.</text:p>
      <text:p text:style-name="Standard"/>
      <text:p text:style-name="Standard">NUMÉROS ASSOCIÉS AUX LWA :</text:p>
      <text:p text:style-name="Standard">- Papa Legba <text:s/>→ 1, 10, 11 (gardien des portes, premier)</text:p>
      <text:p text:style-name="Standard">- Danbala <text:s text:c="4"/>→ 7, 77 (les 7 000 anneaux du serpent)</text:p>
      <text:p text:style-name="Standard">- Azaka <text:s text:c="6"/>→ 13 (paysan, travail de la terre)</text:p>
      <text:p text:style-name="Standard">- Baron Samedi → 8, 88 (mort et résurrection)</text:p>
      <text:p text:style-name="Standard">- Erzulie Freda → 3, 30 (beauté, amour, perfection)</text:p>
      <text:p text:style-name="Standard">- Ogou <text:s text:c="7"/>→ 7, 17 (guerrier, fer)</text:p>
      <text:p text:style-name="Standard">- Marassa <text:s text:c="4"/>→ 22 (les jumeaux, la paire)</text:p>
      <text:p text:style-name="Standard">- Agwé <text:s text:c="7"/>→ 9, 87 (mer, profondeur)</text:p>
      <text:p text:style-name="Standard"/>
      <text:p text:style-name="Standard">ACTION RITUELLE RECOMMANDÉE :</text:p>
      <text:p text:style-name="Standard">Offrir à Azaka (le lwa de l'abondance et du travail) :</text:p>
      <text:p text:style-name="Standard">clairin, maïs, bougie bleue. Remercier le lwa pour la vision.</text:p>
      <text:p text:style-name="Standard">Ne jamais jouer tous ses avoirs sur un rêve — le lwa teste</text:p>
      <text:p text:style-name="Standard">aussi la sagesse de son servant.</text:p>
      <text:p text:style-name="Standard"/>
      <text:p text:style-name="Standard"/>
      <text:p text:style-name="Standard"><text:soft-page-break/>----------------------------------------------------------------</text:p>
      <text:p text:style-name="Standard">RÊVE #27 — ÂME EMPRISONNÉE / CAPTIVE</text:p>
      <text:p text:style-name="Standard">----------------------------------------------------------------</text:p>
      <text:p text:style-name="Standard">LWA ASSOCIÉS <text:s/>: Baron Samedi / Gede / Bokor (présence hostile)</text:p>
      <text:p text:style-name="Standard">NANCHON <text:s text:c="6"/>: Gede</text:p>
      <text:p text:style-name="Standard"/>
      <text:p text:style-name="Standard">DESCRIPTION DU RÊVE :</text:p>
      <text:p text:style-name="Standard">Se voir enfermé dans un endroit dont on ne peut sortir, voir</text:p>
      <text:p text:style-name="Standard">quelqu'un en cage, voir une âme dans une bouteille ou un bocal,</text:p>
      <text:p text:style-name="Standard">rêver d'être enchaîné, incapable de bouger.</text:p>
      <text:p text:style-name="Standard"/>
      <text:p text:style-name="Standard">INTERPRÉTATION VODOU :</text:p>
      <text:p text:style-name="Standard">Dans la tradition vodou haïtienne, l'âme peut être capturée par</text:p>
      <text:p text:style-name="Standard">un bokor (praticien malveillant) — c'est le principe du zombi.</text:p>
      <text:p text:style-name="Standard">Le Ti Bon Ange (la partie personnelle de l'âme) est capturé et</text:p>
      <text:p text:style-name="Standard">placé dans un bocal ou un paquet magique. Rêver d'une âme</text:p>
      <text:p text:style-name="Standard">emprisonnée est un signal d'alarme sérieux.</text:p>
      <text:p text:style-name="Standard"/>
      <text:p text:style-name="Standard">CE QUE CE RÊVE PEUT SIGNIFIER :</text:p>
      <text:p text:style-name="Standard">1. Votre propre Ti Bon Ange est sous attaque spirituelle.</text:p>
      <text:p text:style-name="Standard">2. Vous percevez l'âme captive d'un proche ou d'un ancêtre.</text:p>
      <text:p text:style-name="Standard">3. Un travail de magie défensive vous a été fait sans votre consentement.</text:p>
      <text:p text:style-name="Standard">4. Un aspect de votre personnalité est "enfermé" par des peurs</text:p>
      <text:p text:style-name="Standard"><text:s text:c="3"/>ou des traumas non résolus (dimension psycho-spirituelle).</text:p>
      <text:p text:style-name="Standard"/>
      <text:p text:style-name="Standard">NUANCES :</text:p>
      <text:p text:style-name="Standard">- Vous-même enfermé, incapable de crier → votre Ti Bon Ange</text:p>
      <text:p text:style-name="Standard"><text:s text:c="42"/>est sous menace directe. Urgence.</text:p>
      <text:p text:style-name="Standard">- Voir quelqu'un d'autre enfermé <text:s text:c="8"/>→ un proche est victime</text:p>
      <text:p text:style-name="Standard"><text:s text:c="43"/>d'un travail hostile.</text:p>
      <text:p text:style-name="Standard">- Âme dans une bouteille / bocal <text:s text:c="8"/>→ zombification en cours.</text:p>
      <text:p text:style-name="Standard"><text:s text:c="43"/>Un bokor a capturé une âme.</text:p>
      <text:p text:style-name="Standard">- Être libéré dans le rêve <text:s text:c="14"/>→ une protection divine</text:p>
      <text:p text:style-name="Standard"><text:s text:c="43"/>est intervenue. Un lwa vous défend.</text:p>
      <text:p text:style-name="Standard">- Chaînes qui se brisent <text:s text:c="16"/>→ libération à venir</text:p>
      <text:p text:style-name="Standard"><text:s text:c="43"/>après une longue période de blocage.</text:p>
      <text:p text:style-name="Standard"/>
      <text:p text:style-name="Standard">ACTION RITUELLE URGENTE :</text:p>
      <text:p text:style-name="Standard">Consulter immédiatement un houngan ou une manbo. Ce rêve ne</text:p>
      <text:p text:style-name="Standard">doit jamais être ignoré. Des rituels de protection du Ti Bon Ange</text:p>
      <text:p text:style-name="Standard">existent dans la tradition : bains rituels, protections portées,</text:p>
      <text:p text:style-name="Standard">cérémonies de dégagement avec les Gede.</text:p>
      <text:p text:style-name="Standard"/>
      <text:p text:style-name="Standard"/>
      <text:p text:style-name="Standard">----------------------------------------------------------------</text:p>
      <text:p text:style-name="Standard">RÊVE #28 — LIBÉRATION D'ÂME / AFFRANCHISSEMENT</text:p>
      <text:p text:style-name="Standard">----------------------------------------------------------------</text:p>
      <text:p text:style-name="Standard">LWA ASSOCIÉS <text:s/>: Baron Samedi / Legba / Ogou Feray</text:p>
      <text:p text:style-name="Standard">NANCHON <text:s text:c="6"/>: Gede / Rada / Nago</text:p>
      <text:p text:style-name="Standard"/>
      <text:p text:style-name="Standard">DESCRIPTION DU RÊVE :</text:p>
      <text:p text:style-name="Standard">Voir quelqu'un sortir de sa prison, voir une âme monter vers la</text:p>
      <text:p text:style-name="Standard"><text:soft-page-break/>lumière, voir des chaînes qui se brisent, voir une porte qui</text:p>
      <text:p text:style-name="Standard">s'ouvre sur la lumière, être libéré dans le rêve.</text:p>
      <text:p text:style-name="Standard"/>
      <text:p text:style-name="Standard">INTERPRÉTATION VODOU :</text:p>
      <text:p text:style-name="Standard">La libération d'une âme est l'un des actes rituels les plus</text:p>
      <text:p text:style-name="Standard">importants du vodou. Le rite du Dessounin libère l'âme d'un</text:p>
      <text:p text:style-name="Standard">mort pour qu'elle rejoigne les ancêtres à Ginen. Rêver d'une</text:p>
      <text:p text:style-name="Standard">libération d'âme peut signifier plusieurs choses.</text:p>
      <text:p text:style-name="Standard"/>
      <text:p text:style-name="Standard">NUANCES :</text:p>
      <text:p text:style-name="Standard">- Âme qui monte vers la lumière → un ancêtre vient d'être libéré.</text:p>
      <text:p text:style-name="Standard"><text:s text:c="34"/>Il rejoint Ginen. Il est en paix.</text:p>
      <text:p text:style-name="Standard">- Vous vous libérez <text:s text:c="12"/>→ fin d'une longue période de blocage</text:p>
      <text:p text:style-name="Standard"><text:s text:c="34"/>spirituel, émotionnel ou matériel.</text:p>
      <text:p text:style-name="Standard"><text:s text:c="34"/>Une nouvelle phase commence.</text:p>
      <text:p text:style-name="Standard">- Quelqu'un se libère de chaînes → liberation dans votre entourage.</text:p>
      <text:p text:style-name="Standard"><text:s text:c="35"/>Ou appel à libérer quelqu'un</text:p>
      <text:p text:style-name="Standard"><text:s text:c="35"/>que vous retenez (physiquement ou spirituellement).</text:p>
      <text:p text:style-name="Standard">- Porte lumineuse avec ancêtre <text:s/>→ le passage entre les mondes est ouvert.</text:p>
      <text:p text:style-name="Standard"><text:s text:c="34"/>Un ancêtre vous dit qu'il va bien.</text:p>
      <text:p text:style-name="Standard">- Baron Samedi ouvre une cage <text:s text:c="2"/>→ il a décidé de libérer quelqu'un</text:p>
      <text:p text:style-name="Standard"><text:s text:c="34"/>de la mort ou d'un emprisonnement spirituel.</text:p>
      <text:p text:style-name="Standard"/>
      <text:p text:style-name="Standard">SIGNIFICATION PROFONDE :</text:p>
      <text:p text:style-name="Standard">Dans le vodou, libérer une âme est aussi libérer soi-même.</text:p>
      <text:p text:style-name="Standard">L'initiation Kanzò est une mort-libération : "mouri pou resisite".</text:p>
      <text:p text:style-name="Standard">Ce rêve parle souvent d'une transformation personnelle profonde.</text:p>
      <text:p text:style-name="Standard"/>
      <text:p text:style-name="Standard"/>
      <text:p text:style-name="Standard">----------------------------------------------------------------</text:p>
      <text:p text:style-name="Standard">RÊVE #29 — PRÉVENTION / AVERTISSEMENT</text:p>
      <text:p text:style-name="Standard">----------------------------------------------------------------</text:p>
      <text:p text:style-name="Standard">LWA ASSOCIÉS <text:s/>: Papa Legba / Ancêtres / Sobo (tonnerre)</text:p>
      <text:p text:style-name="Standard">NANCHON <text:s text:c="6"/>: Rada</text:p>
      <text:p text:style-name="Standard"/>
      <text:p text:style-name="Standard">DESCRIPTION DU RÊVE :</text:p>
      <text:p text:style-name="Standard">Quelqu'un vous prévient d'un danger, voir un signal d'alarme,</text:p>
      <text:p text:style-name="Standard">entendre une voix qui dit "attention", voir quelqu'un vous faire</text:p>
      <text:p text:style-name="Standard">signe de ne pas avancer, voir un obstacle sur le chemin.</text:p>
      <text:p text:style-name="Standard"/>
      <text:p text:style-name="Standard">INTERPRÉTATION VODOU :</text:p>
      <text:p text:style-name="Standard">Les lwa et les ancêtres ont la capacité de voir ce que les vivants</text:p>
      <text:p text:style-name="Standard">ne peuvent pas encore voir. Quand ils envoient un rêve de prévention,</text:p>
      <text:p text:style-name="Standard">c'est une grâce : ils détournent le rêveur d'un danger réel avant</text:p>
      <text:p text:style-name="Standard">qu'il se manifeste.</text:p>
      <text:p text:style-name="Standard"/>
      <text:p text:style-name="Standard">NUANCES :</text:p>
      <text:p text:style-name="Standard">- Voix qui dit "non" ou "arrête" → un lwa ou ancêtre bloque un</text:p>
      <text:p text:style-name="Standard"><text:s text:c="35"/>chemin dangereux. Ne pas forcer.</text:p>
      <text:p text:style-name="Standard">- Obstacle sur la route <text:s text:c="9"/>→ Legba ferme ce chemin temporairement.</text:p>
      <text:p text:style-name="Standard"><text:s text:c="35"/>Il y a une raison.</text:p>
      <text:p text:style-name="Standard">- Voir quelqu'un en danger <text:s text:c="6"/>→ une personne dans votre entourage</text:p>
      <text:p text:style-name="Standard"><text:soft-page-break/><text:s text:c="35"/>a besoin d'être prévenue ou protégée.</text:p>
      <text:p text:style-name="Standard">- Animal qui grogne ou avertit <text:s text:c="2"/>→ la nature elle-même prévient.</text:p>
      <text:p text:style-name="Standard"><text:s text:c="35"/>Instinct spirituel à écouter.</text:p>
      <text:p text:style-name="Standard">- Tonnerre ou éclair <text:s text:c="12"/>→ Sobo ou Agaou frappent pour réveiller.</text:p>
      <text:p text:style-name="Standard"><text:s text:c="35"/>Un danger grave est proche.</text:p>
      <text:p text:style-name="Standard"/>
      <text:p text:style-name="Standard">ACTION RECOMMANDÉE :</text:p>
      <text:p text:style-name="Standard">Remettre en question les projets en cours. Consulter un houngan.</text:p>
      <text:p text:style-name="Standard">Offrir à Legba pour clarifier quel chemin est à éviter.</text:p>
      <text:p text:style-name="Standard"/>
      <text:p text:style-name="Standard"/>
      <text:p text:style-name="Standard">----------------------------------------------------------------</text:p>
      <text:p text:style-name="Standard">RÊVE #30 — DEMANDE D'UN LWA / UN ESPRIT DEMANDE QUELQUE CHOSE</text:p>
      <text:p text:style-name="Standard">----------------------------------------------------------------</text:p>
      <text:p text:style-name="Standard">LWA ASSOCIÉS <text:s/>: Tout lwa selon la demande</text:p>
      <text:p text:style-name="Standard">NANCHON <text:s text:c="6"/>: Selon le lwa</text:p>
      <text:p text:style-name="Standard"/>
      <text:p text:style-name="Standard">DESCRIPTION DU RÊVE :</text:p>
      <text:p text:style-name="Standard">Un être, une voix ou une présence vous demande quelque chose</text:p>
      <text:p text:style-name="Standard">dans le rêve : une offrande, une promesse, une action, une visite,</text:p>
      <text:p text:style-name="Standard">de l'honneur.</text:p>
      <text:p text:style-name="Standard"/>
      <text:p text:style-name="Standard">INTERPRÉTATION VODOU :</text:p>
      <text:p text:style-name="Standard">C'est l'un des rêves les plus directs de la tradition. Un lwa</text:p>
      <text:p text:style-name="Standard">ou un ancêtre contacte explicitement le rêveur pour lui faire</text:p>
      <text:p text:style-name="Standard">une demande concrète. Ne pas honorer cette demande peut mener</text:p>
      <text:p text:style-name="Standard">à des blocages, des maladies ou des malchances répétées.</text:p>
      <text:p text:style-name="Standard"/>
      <text:p text:style-name="Standard">TYPES DE DEMANDES ET SIGNIFICATIONS :</text:p>
      <text:p text:style-name="Standard"/>
      <text:p text:style-name="Standard">Demande de nourriture / offrande :</text:p>
      <text:p text:style-name="Standard">→ Ce lwa ou ancêtre n'a pas été honoré depuis longtemps.</text:p>
      <text:p text:style-name="Standard"><text:s text:c="2"/>Préparer son autel et ses offrandes spécifiques.</text:p>
      <text:p text:style-name="Standard"/>
      <text:p text:style-name="Standard">Demande de cérémonie :</text:p>
      <text:p text:style-name="Standard">→ Un service vodou est nécessaire. Contacter un houngan.</text:p>
      <text:p text:style-name="Standard"/>
      <text:p text:style-name="Standard">Demande de promesse :</text:p>
      <text:p text:style-name="Standard">→ Le lwa veut un engagement formel. À ne pas prendre à la légère.</text:p>
      <text:p text:style-name="Standard"><text:s text:c="2"/>Une promesse faite en rêve à un lwa est un contrat spirituel.</text:p>
      <text:p text:style-name="Standard"/>
      <text:p text:style-name="Standard">Demande de visite / pèlerinage :</text:p>
      <text:p text:style-name="Standard">→ Aller dans un lieu sacré (source, arbre, mer, cimetière).</text:p>
      <text:p text:style-name="Standard"/>
      <text:p text:style-name="Standard">Demande de réconciliation :</text:p>
      <text:p text:style-name="Standard">→ Une relation brisée doit être réparée avant que le blocage</text:p>
      <text:p text:style-name="Standard"><text:s text:c="2"/>se lève.</text:p>
      <text:p text:style-name="Standard"/>
      <text:p text:style-name="Standard">Un ancêtre demande quelque chose :</text:p>
      <text:p text:style-name="Standard">→ Honorer ses funérailles. Faire un Dessounin si non fait.</text:p>
      <text:p text:style-name="Standard"><text:s text:c="2"/>Offrir sa nourriture préférée.</text:p>
      <text:p text:style-name="Standard"/>
      <text:p text:style-name="Standard"><text:soft-page-break/>ACTION RITUELLE RECOMMANDÉE :</text:p>
      <text:p text:style-name="Standard">Honorer la demande dans les 9 jours suivant le rêve.</text:p>
      <text:p text:style-name="Standard">Ne pas repousser, ne pas ignorer. Tout lwa qui demande</text:p>
      <text:p text:style-name="Standard">en rêve a déjà été très patient.</text:p>
      <text:p text:style-name="Standard"/>
      <text:p text:style-name="Standard"/>
      <text:p text:style-name="Standard">----------------------------------------------------------------</text:p>
      <text:p text:style-name="Standard">RÊVE #31 — ENVOÛTEMENT / ATTAQUE SPIRITUELLE</text:p>
      <text:p text:style-name="Standard">----------------------------------------------------------------</text:p>
      <text:p text:style-name="Standard">LWA ASSOCIÉS <text:s/>: Kalfou / Makaya / présence hostile (bokor)</text:p>
      <text:p text:style-name="Standard">NANCHON <text:s text:c="6"/>: Petro (aspect offensif)</text:p>
      <text:p text:style-name="Standard"/>
      <text:p text:style-name="Standard">DESCRIPTION DU RÊVE :</text:p>
      <text:p text:style-name="Standard">Se faire attaquer par une présence invisible, voir quelqu'un vous</text:p>
      <text:p text:style-name="Standard">jeter de la poudre, voir des aiguilles, sentir quelque chose</text:p>
      <text:p text:style-name="Standard">d'étrange planté dans son corps, voir une poupée à son image,</text:p>
      <text:p text:style-name="Standard">être poursuivi par une ombre.</text:p>
      <text:p text:style-name="Standard"/>
      <text:p text:style-name="Standard">INTERPRÉTATION VODOU :</text:p>
      <text:p text:style-name="Standard">Un rêve d'envoûtement est un signal que quelqu'un a engagé un</text:p>
      <text:p text:style-name="Standard">bokor (praticien maléfique) contre le rêveur, ou qu'une énergie</text:p>
      <text:p text:style-name="Standard">hostile a été dirigée. Dans le vodou haïtien, la magie offensive</text:p>
      <text:p text:style-name="Standard">(maji agresif) existe, mais elle peut être détectée et neutralisée.</text:p>
      <text:p text:style-name="Standard"/>
      <text:p text:style-name="Standard">NUANCES :</text:p>
      <text:p text:style-name="Standard">- Poudre jetée sur vous <text:s text:c="4"/>→ wanga (paquet magique) a été préparé.</text:p>
      <text:p text:style-name="Standard"><text:s text:c="30"/>Quelqu'un a fait "travail" contre vous.</text:p>
      <text:p text:style-name="Standard">- Aiguilles / épines <text:s text:c="7"/>→ attaque visant à blesser physiquement</text:p>
      <text:p text:style-name="Standard"><text:s text:c="30"/>ou à paralyser des projets.</text:p>
      <text:p text:style-name="Standard">- Ombre qui poursuit <text:s text:c="7"/>→ une entité attachée a été envoyée.</text:p>
      <text:p text:style-name="Standard"><text:s text:c="30"/>Elle suit le rêveur dans la veille aussi.</text:p>
      <text:p text:style-name="Standard">- Visage connu qui attaque <text:s/>→ la personne connue est impliquée</text:p>
      <text:p text:style-name="Standard"><text:s text:c="30"/>dans le travail hostile, ou son énergie</text:p>
      <text:p text:style-name="Standard"><text:s text:c="30"/>négative vous affecte.</text:p>
      <text:p text:style-name="Standard">- Se défendre et gagner <text:s text:c="4"/>→ votre protection spirituelle est active.</text:p>
      <text:p text:style-name="Standard"><text:s text:c="30"/>Un lwa vous défend déjà.</text:p>
      <text:p text:style-name="Standard">- Se défendre et perdre <text:s text:c="4"/>→ protection insuffisante. Urgence.</text:p>
      <text:p text:style-name="Standard"/>
      <text:p text:style-name="Standard">ACTION RITUELLE URGENTE :</text:p>
      <text:p text:style-name="Standard">Bain de dégagement (bain démaré) avec herbes spécifiques.</text:p>
      <text:p text:style-name="Standard">Consulter un houngan ou une manbo dans les plus brefs délais.</text:p>
      <text:p text:style-name="Standard">Ne pas retourner dans le lieu où l'attaque a commencé avant</text:p>
      <text:p text:style-name="Standard">consultation. Allumer une bougie blanche immédiatement.</text:p>
      <text:p text:style-name="Standard"/>
      <text:p text:style-name="Standard"/>
      <text:p text:style-name="Standard">----------------------------------------------------------------</text:p>
      <text:p text:style-name="Standard">RÊVE #32 — PROTECTION ACCORDÉE</text:p>
      <text:p text:style-name="Standard">----------------------------------------------------------------</text:p>
      <text:p text:style-name="Standard">LWA ASSOCIÉS <text:s/>: Ogou / Ezili Dantò / Baron Samedi / Legba</text:p>
      <text:p text:style-name="Standard">NANCHON <text:s text:c="6"/>: Toutes nanchons</text:p>
      <text:p text:style-name="Standard"/>
      <text:p text:style-name="Standard">DESCRIPTION DU RÊVE :</text:p>
      <text:p text:style-name="Standard"><text:soft-page-break/>Être entouré de lumière, voir un bouclier ou une armure, voir</text:p>
      <text:p text:style-name="Standard">un lwa debout devant vous en protection, voir une lumière blanche</text:p>
      <text:p text:style-name="Standard">ou bleue autour de votre corps, voir un symbole tracé sur vous.</text:p>
      <text:p text:style-name="Standard"/>
      <text:p text:style-name="Standard">INTERPRÉTATION VODOU :</text:p>
      <text:p text:style-name="Standard">Ce rêve est une bénédiction directe. Un lwa vous informe que</text:p>
      <text:p text:style-name="Standard">sa protection est active sur vous. C'est un rêve de réconfort</text:p>
      <text:p text:style-name="Standard">et de confirmation — les esprits veillent.</text:p>
      <text:p text:style-name="Standard"/>
      <text:p text:style-name="Standard">NUANCES :</text:p>
      <text:p text:style-name="Standard">- Lumière blanche autour de vous → Danbala vous enveloppe de pureté.</text:p>
      <text:p text:style-name="Standard"><text:s text:c="35"/>Aucune force hostile ne peut vous</text:p>
      <text:p text:style-name="Standard"><text:s text:c="35"/>atteindre dans cet état.</text:p>
      <text:p text:style-name="Standard">- Homme en rouge devant vous <text:s text:c="4"/>→ Ogou est votre garde du corps.</text:p>
      <text:p text:style-name="Standard"><text:s text:c="35"/>Vous êtes protégé dans vos combats.</text:p>
      <text:p text:style-name="Standard">- Femme à couteau devant vous <text:s text:c="3"/>→ Ezili Dantò protège vos enfants</text:p>
      <text:p text:style-name="Standard"><text:s text:c="35"/>ou votre famille.</text:p>
      <text:p text:style-name="Standard">- Vèvè tracé sur votre corps <text:s text:c="4"/>→ un lwa a posé sa signature sur vous.</text:p>
      <text:p text:style-name="Standard"><text:s text:c="35"/>Protection permanente accordée.</text:p>
      <text:p text:style-name="Standard">- Bouclier / armure <text:s text:c="13"/>→ protection contre des attaques</text:p>
      <text:p text:style-name="Standard"><text:s text:c="35"/>spécifiques qui arrivent.</text:p>
      <text:p text:style-name="Standard">- Lumière bleue ou arc-en-ciel <text:s text:c="2"/>→ protection d'Ayida Wedo et Danbala.</text:p>
      <text:p text:style-name="Standard"><text:s text:c="35"/>Harmonie totale autour de vous.</text:p>
      <text:p text:style-name="Standard"/>
      <text:p text:style-name="Standard">ACTION RITUELLE RECOMMANDÉE :</text:p>
      <text:p text:style-name="Standard">Remercier le lwa qui s'est manifesté. Renforcer sa protection</text:p>
      <text:p text:style-name="Standard">en lui offrant ses offrandes spécifiques. Maintenir la fidélité</text:p>
      <text:p text:style-name="Standard">à la tradition pour conserver cette protection.</text:p>
      <text:p text:style-name="Standard"/>
      <text:p text:style-name="Standard"/>
      <text:p text:style-name="Standard">----------------------------------------------------------------</text:p>
      <text:p text:style-name="Standard">RÊVE #33 — MALHEUR ANNONCÉ</text:p>
      <text:p text:style-name="Standard">----------------------------------------------------------------</text:p>
      <text:p text:style-name="Standard">LWA ASSOCIÉS <text:s/>: Baron Samedi / Ancêtres / Sobo (avertissement)</text:p>
      <text:p text:style-name="Standard">NANCHON <text:s text:c="6"/>: Gede / Rada</text:p>
      <text:p text:style-name="Standard"/>
      <text:p text:style-name="Standard">DESCRIPTION DU RÊVE :</text:p>
      <text:p text:style-name="Standard">Voir une catastrophe, voir sa maison brûler ou s'effondrer, voir</text:p>
      <text:p text:style-name="Standard">un accident, voir quelqu'un pleurer sans consolation, voir du</text:p>
      <text:p text:style-name="Standard">sang en abondance, voir un cercueil vide.</text:p>
      <text:p text:style-name="Standard"/>
      <text:p text:style-name="Standard">INTERPRÉTATION VODOU :</text:p>
      <text:p text:style-name="Standard">Un rêve de malheur est RAREMENT une prédiction figée dans le</text:p>
      <text:p text:style-name="Standard">vodou haïtien. C'est presque toujours un avertissement modifiable :</text:p>
      <text:p text:style-name="Standard">les lwa et ancêtres préviennent pour que le rêveur puisse agir</text:p>
      <text:p text:style-name="Standard">et éviter ce qui s'annonce.</text:p>
      <text:p text:style-name="Standard"/>
      <text:p text:style-name="Standard">NUANCES :</text:p>
      <text:p text:style-name="Standard">- Maison qui brûle ou s'effondre → menace sur la famille ou le foyer.</text:p>
      <text:p text:style-name="Standard"><text:s text:c="35"/>Des tensions ou forces destructrices</text:p>
      <text:p text:style-name="Standard"><text:s text:c="35"/>sont actives. Agir vite.</text:p>
      <text:p text:style-name="Standard">- Voir du sang <text:s text:c="18"/>→ blessure physique ou émotionnelle</text:p>
      <text:p text:style-name="Standard"><text:soft-page-break/><text:s text:c="35"/>à venir. Ou sacrifice nécessaire.</text:p>
      <text:p text:style-name="Standard">- Accident de voiture ou de route → éviter les voyages imprudents</text:p>
      <text:p text:style-name="Standard"><text:s text:c="36"/>dans les jours suivant le rêve.</text:p>
      <text:p text:style-name="Standard">- Quelqu'un pleure inconsolablement → une perte est proche.</text:p>
      <text:p text:style-name="Standard"><text:s text:c="38"/>Préparer son soutien.</text:p>
      <text:p text:style-name="Standard">- Cercueil vide <text:s text:c="17"/>→ la mort est rôdée mais n'a pas</text:p>
      <text:p text:style-name="Standard"><text:s text:c="35"/>encore trouvé sa cible. Protection urgente.</text:p>
      <text:p text:style-name="Standard">- Eau noire ou boueuse <text:s text:c="11"/>→ deuil ou dépression à venir.</text:p>
      <text:p text:style-name="Standard"><text:s text:c="35"/>Renforcer le soutien spirituel.</text:p>
      <text:p text:style-name="Standard"/>
      <text:p text:style-name="Standard">ACTION RITUELLE URGENTE :</text:p>
      <text:p text:style-name="Standard">Ce rêve appelle une action dans les 3 jours. Consulter un houngan</text:p>
      <text:p text:style-name="Standard">pour des rituels de protection préventive. Offrir à Baron Samedi</text:p>
      <text:p text:style-name="Standard">pour qu'il détourne la mort ou la maladie annoncée.</text:p>
      <text:p text:style-name="Standard"/>
      <text:p text:style-name="Standard"/>
      <text:p text:style-name="Standard">----------------------------------------------------------------</text:p>
      <text:p text:style-name="Standard">RÊVE #34 — BONHEUR / JOIE SPIRITUELLE</text:p>
      <text:p text:style-name="Standard">----------------------------------------------------------------</text:p>
      <text:p text:style-name="Standard">LWA ASSOCIÉS <text:s/>: Erzulie Freda / Marassa / Azaka / Danbala</text:p>
      <text:p text:style-name="Standard">NANCHON <text:s text:c="6"/>: Rada</text:p>
      <text:p text:style-name="Standard"/>
      <text:p text:style-name="Standard">DESCRIPTION DU RÊVE :</text:p>
      <text:p text:style-name="Standard">Rêver de fête, de rires, de danse, de lumières brillantes,</text:p>
      <text:p text:style-name="Standard">de paysages magnifiques, de banquets, d'enfants qui jouent,</text:p>
      <text:p text:style-name="Standard">de cadeaux reçus.</text:p>
      <text:p text:style-name="Standard"/>
      <text:p text:style-name="Standard">INTERPRÉTATION VODOU :</text:p>
      <text:p text:style-name="Standard">Le bonheur en rêve est une visitation de joie directe de la</text:p>
      <text:p text:style-name="Standard">part des lwa. Ce n'est pas un "simple bon rêve" — c'est une</text:p>
      <text:p text:style-name="Standard">information spirituelle sur l'état de la relation entre le</text:p>
      <text:p text:style-name="Standard">rêveur et ses lwa. Quand les esprits sont contents, ils partagent</text:p>
      <text:p text:style-name="Standard">leur joie avec leurs servants.</text:p>
      <text:p text:style-name="Standard"/>
      <text:p text:style-name="Standard">NUANCES :</text:p>
      <text:p text:style-name="Standard">- Grande fête avec musique <text:s text:c="6"/>→ les lwa célèbrent. Une période</text:p>
      <text:p text:style-name="Standard"><text:s text:c="35"/>heureuse commence dans la vie.</text:p>
      <text:p text:style-name="Standard">- Recevoir des cadeaux <text:s text:c="10"/>→ les lwa vous offrent des dons :</text:p>
      <text:p text:style-name="Standard"><text:s text:c="35"/>talent, santé, argent, amour.</text:p>
      <text:p text:style-name="Standard">- Enfants qui jouent joyeusement → les Marassa sont heureux.</text:p>
      <text:p text:style-name="Standard"><text:s text:c="35"/>Bénédiction sur la fertilité et la famille.</text:p>
      <text:p text:style-name="Standard">- Paysage paradisiaque <text:s text:c="10"/>→ vision de Ginen — le monde heureux</text:p>
      <text:p text:style-name="Standard"><text:s text:c="35"/>des ancêtres. Vous en approchez spirituellement.</text:p>
      <text:p text:style-name="Standard">- Danser dans une cérémonie <text:s text:c="5"/>→ communion parfaite avec les lwa.</text:p>
      <text:p text:style-name="Standard"><text:s text:c="35"/>Votre service est accepté et récompensé.</text:p>
      <text:p text:style-name="Standard">- Rires et lumières <text:s text:c="13"/>→ Erzulie Freda vous accorde sa joie.</text:p>
      <text:p text:style-name="Standard"><text:s text:c="35"/>Une nouvelle période d'abondance commence.</text:p>
      <text:p text:style-name="Standard"/>
      <text:p text:style-name="Standard">ACTION RITUELLE RECOMMANDÉE :</text:p>
      <text:p text:style-name="Standard">Remercier les lwa pour cette vision. Partager la joie :</text:p>
      <text:p text:style-name="Standard">une petite cérémonie, des offrandes de joie (sucreries, parfums,</text:p>
      <text:p text:style-name="Standard">fleurs), de la musique pour les ancêtres.</text:p>
      <text:p text:style-name="Standard"><text:soft-page-break/></text:p>
      <text:p text:style-name="Standard"/>
      <text:p text:style-name="Standard">----------------------------------------------------------------</text:p>
      <text:p text:style-name="Standard">RÊVE #35 — RICHESSE / ABONDANCE</text:p>
      <text:p text:style-name="Standard">----------------------------------------------------------------</text:p>
      <text:p text:style-name="Standard">LWA ASSOCIÉS <text:s/>: Azaka / Erzulie Freda / Agwé / Danbala</text:p>
      <text:p text:style-name="Standard">NANCHON <text:s text:c="6"/>: Rada</text:p>
      <text:p text:style-name="Standard"/>
      <text:p text:style-name="Standard">DESCRIPTION DU RÊVE :</text:p>
      <text:p text:style-name="Standard">Voir de l'or, des trésors, des récoltes abondantes, une maison</text:p>
      <text:p text:style-name="Standard">prospère, voir de l'argent couler comme de l'eau, rêver qu'on</text:p>
      <text:p text:style-name="Standard">est riche.</text:p>
      <text:p text:style-name="Standard"/>
      <text:p text:style-name="Standard">INTERPRÉTATION VODOU :</text:p>
      <text:p text:style-name="Standard">La richesse en rêve dans le vodou haïtien est un annonce</text:p>
      <text:p text:style-name="Standard">d'abondance accordée par les lwa — mais elle est toujours</text:p>
      <text:p text:style-name="Standard">conditionnelle au travail, à la fidélité et à l'honneur rendu.</text:p>
      <text:p text:style-name="Standard">Les lwa donnent l'abondance à ceux qui respectent la tradition.</text:p>
      <text:p text:style-name="Standard"/>
      <text:p text:style-name="Standard">NUANCES SELON LA SOURCE DE RICHESSE :</text:p>
      <text:p text:style-name="Standard">- Or et bijoux <text:s text:c="18"/>→ Erzulie Freda vous accorde luxe</text:p>
      <text:p text:style-name="Standard"><text:s text:c="35"/>et abondance. Elle est satisfaite</text:p>
      <text:p text:style-name="Standard"><text:s text:c="35"/>de ses offrandes.</text:p>
      <text:p text:style-name="Standard">- Récoltes abondantes / jardin <text:s text:c="2"/>→ Azaka vous bénit dans votre travail.</text:p>
      <text:p text:style-name="Standard"><text:s text:c="35"/>Période de prospérité par l'effort.</text:p>
      <text:p text:style-name="Standard">- Mer qui donne ses trésors <text:s text:c="5"/>→ Agwé ou La Sirène vous accordent</text:p>
      <text:p text:style-name="Standard"><text:s text:c="35"/>une richesse venue de loin, un voyage,</text:p>
      <text:p text:style-name="Standard"><text:s text:c="35"/>une opportunité maritime ou commerciale.</text:p>
      <text:p text:style-name="Standard">- Or qui coule comme de l'eau <text:s text:c="3"/>→ richesse abondante mais éphémère</text:p>
      <text:p text:style-name="Standard"><text:s text:c="35"/>si non bien gérée.</text:p>
      <text:p text:style-name="Standard">- Serpent blanc sur de l'or <text:s text:c="5"/>→ Danbala vous accorde sagesse ET richesse.</text:p>
      <text:p text:style-name="Standard"><text:s text:c="35"/>La richesse spirituelle précède la matérielle.</text:p>
      <text:p text:style-name="Standard">- Trouver un trésor caché <text:s text:c="7"/>→ une opportunité cachée va se révéler.</text:p>
      <text:p text:style-name="Standard"/>
      <text:p text:style-name="Standard">ACTION RITUELLE RECOMMANDÉE :</text:p>
      <text:p text:style-name="Standard">Offrir à Azaka : clairin, maïs, makouti (sac de paille).</text:p>
      <text:p text:style-name="Standard">Offrir à Erzulie Freda : parfum, gâteaux, bougie d'or.</text:p>
      <text:p text:style-name="Standard">Promettre de partager une part de l'abondance reçue.</text:p>
      <text:p text:style-name="Standard"/>
      <text:p text:style-name="Standard"/>
      <text:p text:style-name="Standard">----------------------------------------------------------------</text:p>
      <text:p text:style-name="Standard">RÊVE #36 — CONNAISSANCE / RÉVÉLATION</text:p>
      <text:p text:style-name="Standard">----------------------------------------------------------------</text:p>
      <text:p text:style-name="Standard">LWA ASSOCIÉS <text:s/>: Danbala / Loko / Simbi / Gran Bwa</text:p>
      <text:p text:style-name="Standard">NANCHON <text:s text:c="6"/>: Rada / Kongo</text:p>
      <text:p text:style-name="Standard"/>
      <text:p text:style-name="Standard">DESCRIPTION DU RÊVE :</text:p>
      <text:p text:style-name="Standard">Recevoir un enseignement, voir un livre ou un texte sacré,</text:p>
      <text:p text:style-name="Standard">être dans une école ou un temple, recevoir un secret à l'oreille,</text:p>
      <text:p text:style-name="Standard">voir des symboles ou des vèvè s'illuminer, comprendre quelque</text:p>
      <text:p text:style-name="Standard">chose d'incompréhensible.</text:p>
      <text:p text:style-name="Standard"/>
      <text:p text:style-name="Standard"><text:soft-page-break/>INTERPRÉTATION VODOU :</text:p>
      <text:p text:style-name="Standard">Dans la tradition vodou haïtienne, la connaissance est transmise</text:p>
      <text:p text:style-name="Standard">par les rêves. Beaucoup de hougans et manbos rapportent avoir</text:p>
      <text:p text:style-name="Standard">reçu leur premier enseignement dans un rêve avant toute initiation</text:p>
      <text:p text:style-name="Standard">formelle. Les lwa sont les premiers transmetteurs de savoir.</text:p>
      <text:p text:style-name="Standard"/>
      <text:p text:style-name="Standard">NUANCES :</text:p>
      <text:p text:style-name="Standard">- Quelqu'un vous enseigne en rêve → c'est un lwa ou un ancêtre initié</text:p>
      <text:p text:style-name="Standard"><text:s text:c="36"/>qui vous transmet un savoir direct.</text:p>
      <text:p text:style-name="Standard"><text:s text:c="36"/>Se souvenir exactement des paroles.</text:p>
      <text:p text:style-name="Standard">- Livre sacré ou vèvè qui brillent → accès à une connaissance mystique.</text:p>
      <text:p text:style-name="Standard"><text:s text:c="37"/>Loko Atissou, gardien des savoirs,</text:p>
      <text:p text:style-name="Standard"><text:s text:c="37"/>vous ouvre ses archives.</text:p>
      <text:p text:style-name="Standard">- Comprendre une langue inconnue <text:s/>→ don de communication avec les esprits.</text:p>
      <text:p text:style-name="Standard"><text:s text:c="36"/>Le rêveur développe des capacités</text:p>
      <text:p text:style-name="Standard"><text:s text:c="36"/>de clairvoyance ou de médiumnité.</text:p>
      <text:p text:style-name="Standard">- Simbi vous guide <text:s text:c="14"/>→ don de divination et de guérison.</text:p>
      <text:p text:style-name="Standard"><text:s text:c="35"/>Simbi transmet sa clairvoyance.</text:p>
      <text:p text:style-name="Standard">- Un houngan / manbo vous enseigne → appel à rejoindre la tradition.</text:p>
      <text:p text:style-name="Standard"><text:s text:c="37"/>L'initiation Kanzò est proche.</text:p>
      <text:p text:style-name="Standard"/>
      <text:p text:style-name="Standard">SIGNIFICATION PROFONDE :</text:p>
      <text:p text:style-name="Standard">Ce type de rêve est souvent le début du chemin initiatique.</text:p>
      <text:p text:style-name="Standard">Beaucoup de praticiens vodou racontent que leur vocation a</text:p>
      <text:p text:style-name="Standard">commencé par un rêve de connaissance. "Le rêve est utile comme</text:p>
      <text:p text:style-name="Standard">espace de rencontre avec les lwa pour obtenir les connaissances</text:p>
      <text:p text:style-name="Standard">nécessaires pour soigner." (tradition orale)</text:p>
      <text:p text:style-name="Standard"/>
      <text:p text:style-name="Standard">ACTION RITUELLE RECOMMANDÉE :</text:p>
      <text:p text:style-name="Standard">Écrire absolument tout ce qui a été reçu dans ce rêve. Ne rien</text:p>
      <text:p text:style-name="Standard">oublier, ne rien écarter. Partager avec un praticien de confiance.</text:p>
      <text:p text:style-name="Standard">Ce rêve mérite une consultation sérieuse.</text:p>
      <text:p text:style-name="Standard"/>
      <text:p text:style-name="Standard"/>
      <text:p text:style-name="Standard">----------------------------------------------------------------</text:p>
      <text:p text:style-name="Standard">RÊVE #37 — TU ES CHOISI / UN LWA TE RÉCLAME</text:p>
      <text:p text:style-name="Standard">----------------------------------------------------------------</text:p>
      <text:p text:style-name="Standard">LWA ASSOCIÉS <text:s/>: Le lwa qui se manifeste spécifiquement</text:p>
      <text:p text:style-name="Standard">NANCHON <text:s text:c="6"/>: Selon le lwa</text:p>
      <text:p text:style-name="Standard"/>
      <text:p text:style-name="Standard">DESCRIPTION DU RÊVE :</text:p>
      <text:p text:style-name="Standard">Un être de lumière vous désigne, une voix vous appelle par votre</text:p>
      <text:p text:style-name="Standard">nom, quelqu'un vous remet un objet sacré (ason, machette, bijoux,</text:p>
      <text:p text:style-name="Standard">clés), on vous dit "c'est toi que je veux", on vous donne une</text:p>
      <text:p text:style-name="Standard">mission, vous vous réveillez en larmes de joie ou de terreur.</text:p>
      <text:p text:style-name="Standard"/>
      <text:p text:style-name="Standard">INTERPRÉTATION VODOU — L'APPEL SACRÉ :</text:p>
      <text:p text:style-name="Standard">C'est le rêve le plus important qui soit dans toute la tradition</text:p>
      <text:p text:style-name="Standard">vodou haïtienne. Il s'appelle "appèl" (l'appel) et marque le</text:p>
      <text:p text:style-name="Standard">moment où un lwa choisit formellement son servant.</text:p>
      <text:p text:style-name="Standard"/>
      <text:p text:style-name="Standard">Les lwa "n'attendent pas qu'on vienne vers eux — ce sont eux</text:p>
      <text:p text:style-name="Standard"><text:soft-page-break/>qui choisissent." (tradition orale). Beaucoup d'oungans et de</text:p>
      <text:p text:style-name="Standard">manbos décrivent leur vocation comme un processus initié par</text:p>
      <text:p text:style-name="Standard">un rêve répété où le lwa les réclamait.</text:p>
      <text:p text:style-name="Standard"/>
      <text:p text:style-name="Standard">SIGNES QUE C'EST UN VRAI APPEL :</text:p>
      <text:p text:style-name="Standard">1. Le rêve est d'une clarté et d'une vivacité surnaturelles.</text:p>
      <text:p text:style-name="Standard">2. Il se répète exactement de la même façon.</text:p>
      <text:p text:style-name="Standard">3. Le rêveur se réveille avec une certitude intérieure.</text:p>
      <text:p text:style-name="Standard">4. Des événements de la vie éveillée confirment le message</text:p>
      <text:p text:style-name="Standard"><text:s text:c="3"/>(maladies inexpliquées, chance ou malchance répétée, etc.)</text:p>
      <text:p text:style-name="Standard">5. D'autres personnes commencent à voir le rêveur différemment.</text:p>
      <text:p text:style-name="Standard"/>
      <text:p text:style-name="Standard">NUANCES SELON CE QUI EST DONNÉ :</text:p>
      <text:p text:style-name="Standard">- L'ason (crécelle sacrée) → appel à devenir oungan ou manbo.</text:p>
      <text:p text:style-name="Standard"><text:s text:c="29"/>C'est le signe le plus direct de la prêtrise.</text:p>
      <text:p text:style-name="Standard">- Une machette ou une épée → Ogou vous réclame comme guerrier</text:p>
      <text:p text:style-name="Standard"><text:s text:c="29"/>spirituel, défenseur de la communauté.</text:p>
      <text:p text:style-name="Standard">- Des bijoux et des parfums → Erzulie Freda ou La Sirène vous veulent</text:p>
      <text:p text:style-name="Standard"><text:s text:c="30"/>comme époux/épouse mystique.</text:p>
      <text:p text:style-name="Standard">- Une clé <text:s text:c="18"/>→ Legba vous confie la garderie des portes.</text:p>
      <text:p text:style-name="Standard"><text:s text:c="30"/>Vous serez un passeur, un guide.</text:p>
      <text:p text:style-name="Standard">- De la farine blanche <text:s text:c="5"/>→ Danbala vous appelle à la pureté totale</text:p>
      <text:p text:style-name="Standard"><text:s text:c="30"/>et à la sagesse ancestrale.</text:p>
      <text:p text:style-name="Standard">- Un vêtement blanc/voile <text:s text:c="2"/>→ initiation Kanzò imminente.</text:p>
      <text:p text:style-name="Standard"><text:s text:c="30"/>Le lwa prépare votre entrée dans le djèvò.</text:p>
      <text:p text:style-name="Standard">- Votre nom prononcé 3 fois → dans le vodou, trois appels = confirmation</text:p>
      <text:p text:style-name="Standard"><text:s text:c="30"/>absolue. Le lwa ne peut pas être plus clair.</text:p>
      <text:p text:style-name="Standard"/>
      <text:p text:style-name="Standard">LES CONSÉQUENCES DE REFUSER L'APPEL :</text:p>
      <text:p text:style-name="Standard">Dans la tradition vodou, refuser l'appel d'un lwa est dangereux.</text:p>
      <text:p text:style-name="Standard">Le lwa insiste par des maladies, des échecs répétés, des accidents.</text:p>
      <text:p text:style-name="Standard">"De nombreux ounoans avancent qu'ils sont devenus responsables de</text:p>
      <text:p text:style-name="Standard">culte contre leur propre gré, que les lwa les ont demandé comme</text:p>
      <text:p text:style-name="Standard">serviteurs en leur imposant souvent des maladies comme sanction</text:p>
      <text:p text:style-name="Standard">pour appuyer leur appel." (N. Vornax, tradition orale)</text:p>
      <text:p text:style-name="Standard"/>
      <text:p text:style-name="Standard">LA RÉPONSE À DONNER :</text:p>
      <text:p text:style-name="Standard">Ne pas fuir. Trouver un houngan ou une manbo de confiance.</text:p>
      <text:p text:style-name="Standard">Lui raconter le rêve dans tous ses détails. Le praticien peut</text:p>
      <text:p text:style-name="Standard">identifier quel lwa appelle, et préparer l'initiation adéquate.</text:p>
      <text:p text:style-name="Standard">L'appel est une grâce, pas une punition.</text:p>
      <text:p text:style-name="Standard"/>
      <text:p text:style-name="Standard">ACTION RITUELLE RECOMMANDÉE :</text:p>
      <text:p text:style-name="Standard">Dans les 7 jours suivant ce rêve : allumer une bougie blanche,</text:p>
      <text:p text:style-name="Standard">parler à voix haute au lwa qui vous a appelé, lui dire que</text:p>
      <text:p text:style-name="Standard">vous avez entendu son appel et que vous cherchez guidance.</text:p>
      <text:p text:style-name="Standard">Puis consulter un praticien initié.</text:p>
      <text:p text:style-name="Standard"/>
      <text:p text:style-name="Standard"/>
      <text:p text:style-name="Standard">================================================================</text:p>
      <text:p text:style-name="Standard">TABLEAU COMPLET — 37 RÊVES × LWA × MOTS-CLÉS DE RECHERCHE</text:p>
      <text:p text:style-name="Standard">================================================================</text:p>
      <text:p text:style-name="Standard"><text:soft-page-break/></text:p>
      <text:p text:style-name="Standard">RÊVE <text:s text:c="18"/>| LWA <text:s text:c="13"/>| MOTS-CLÉS CRÉOLE/FR/HAÏTIEN</text:p>
      <text:p text:style-name="Standard">-----------------------|------------------|-----------------------------</text:p>
      <text:p text:style-name="Standard">Serpent <text:s text:c="15"/>| Danbala <text:s text:c="9"/>| koulèv, serpan, sèpan, blanc</text:p>
      <text:p text:style-name="Standard">Arc-en-ciel <text:s text:c="11"/>| Ayida Wedo <text:s text:c="6"/>| lakansyèl, couleurs, lumière ciel</text:p>
      <text:p text:style-name="Standard">Eau calme <text:s text:c="13"/>| Agwé / La Sirène | dlo, lanmè, lak, dous</text:p>
      <text:p text:style-name="Standard">Rivière / source <text:s text:c="6"/>| Simbi <text:s text:c="11"/>| larivyè, sous dlo, wout dlo</text:p>
      <text:p text:style-name="Standard">Feu / forge <text:s text:c="11"/>| Ogou <text:s text:c="12"/>| dife, flanm, fòj, chabin</text:p>
      <text:p text:style-name="Standard">Vieillard canne <text:s text:c="7"/>| Legba <text:s text:c="11"/>| granmoun, baton, kwazyeman</text:p>
      <text:p text:style-name="Standard">Carrefour <text:s text:c="13"/>| Legba / Kalfou <text:s text:c="2"/>| kafou, kalfou, chimen, kwaze</text:p>
      <text:p text:style-name="Standard">Cimetière <text:s text:c="13"/>| Baron Samedi <text:s text:c="4"/>| simityè, kav, lakwa, mouri</text:p>
      <text:p text:style-name="Standard">Ancêtre mort <text:s text:c="10"/>| Gede <text:s text:c="12"/>| mouri, zansèt, mò, defin</text:p>
      <text:p text:style-name="Standard">Belle femme en blanc <text:s text:c="2"/>| Erzulie Freda <text:s text:c="3"/>| fanm bèl, roze, blanch, bijou</text:p>
      <text:p text:style-name="Standard">Femme couteau <text:s text:c="9"/>| Ezili Dantò <text:s text:c="5"/>| fanm nwa, kouto, manman</text:p>
      <text:p text:style-name="Standard">Uniforme rouge <text:s text:c="8"/>| Ogou <text:s text:c="12"/>| sòlda, wouj, machet, lame</text:p>
      <text:p text:style-name="Standard">Sirène / mer <text:s text:c="10"/>| La Sirène <text:s text:c="7"/>| lasirèn, mama dlo, mèmè dlo</text:p>
      <text:p text:style-name="Standard">Grand arbre <text:s text:c="11"/>| Gran Bwa / Loko <text:s/>| pyebwa, gran bwa, rakine</text:p>
      <text:p text:style-name="Standard">Palmier royal <text:s text:c="9"/>| Ayizan <text:s text:c="10"/>| palmis, fèy, pwòp</text:p>
      <text:p text:style-name="Standard">Cheval <text:s text:c="16"/>| Legba / Ogou <text:s text:c="4"/>| chwal, kouri, monte</text:p>
      <text:p text:style-name="Standard">Chien carrefour <text:s text:c="7"/>| Papa Legba <text:s text:c="6"/>| chen, kafou, lakou</text:p>
      <text:p text:style-name="Standard">Mariage mystérieux <text:s text:c="4"/>| Erzulie <text:s text:c="9"/>| maryaj, bag, lwa, epouse</text:p>
      <text:p text:style-name="Standard">Mort / enterrement <text:s text:c="4"/>| Baron Samedi <text:s text:c="4"/>| lanmò, antèman, kavo</text:p>
      <text:p text:style-name="Standard">Voler / planer <text:s text:c="8"/>| Danbala / Loko <text:s text:c="2"/>| vole, syèl, plannen, monte</text:p>
      <text:p text:style-name="Standard">Fleurs <text:s text:c="16"/>| Erzulie Freda <text:s text:c="3"/>| flè, roze, pafin, jaden</text:p>
      <text:p text:style-name="Standard">Tambours / cérémonie <text:s text:c="2"/>| Tous lwa <text:s text:c="8"/>| tanbou, sevis, dans, sèvi</text:p>
      <text:p text:style-name="Standard">Jumeaux <text:s text:c="15"/>| Marassa <text:s text:c="9"/>| marasa, mèmèt, kabann, pè</text:p>
      <text:p text:style-name="Standard">Porte / pont <text:s text:c="10"/>| Papa Legba <text:s text:c="6"/>| pòt, pon, bayi, pase</text:p>
      <text:p text:style-name="Standard">Taureau <text:s text:c="15"/>| Bossou <text:s text:c="10"/>| towo, kòn, wòb</text:p>
      <text:p text:style-name="Standard">Loterie / chiffres <text:s text:c="4"/>| Azaka / Legba <text:s text:c="3"/>| bolet, tchala, nimewo, lajan</text:p>
      <text:p text:style-name="Standard">Âme emprisonnée <text:s text:c="7"/>| Baron / Gede <text:s text:c="4"/>| nanm, prizon, kaptif, bwa</text:p>
      <text:p text:style-name="Standard">Libération âme <text:s text:c="8"/>| Baron / Legba <text:s text:c="3"/>| libète, dezancha, delivrans</text:p>
      <text:p text:style-name="Standard">Prévention <text:s text:c="12"/>| Legba / Ancêtres | avètisman, danje, pangar</text:p>
      <text:p text:style-name="Standard">Demande d'un lwa <text:s text:c="6"/>| Selon lwa <text:s text:c="7"/>| mande, ofrann, kontra, sèvis</text:p>
      <text:p text:style-name="Standard">Envoûtement <text:s text:c="11"/>| Kalfou / Bokor <text:s text:c="2"/>| wanga, voye, travay, jete</text:p>
      <text:p text:style-name="Standard">Protection accordée <text:s text:c="3"/>| Ogou / Danbala <text:s text:c="2"/>| pwoteksyon, blende, gadyen</text:p>
      <text:p text:style-name="Standard">Malheur annoncé <text:s text:c="7"/>| Baron / Ancêtres | malè, pèdi, kraze, tonbe</text:p>
      <text:p text:style-name="Standard">Bonheur / joie <text:s text:c="8"/>| Erzulie / Marasa | kè kontan, riyann, fèt, chante</text:p>
      <text:p text:style-name="Standard">Richesse / abondance <text:s text:c="2"/>| Azaka / Erzulie <text:s/>| richès, lajan, rekòt, trezò</text:p>
      <text:p text:style-name="Standard">Connaissance <text:s text:c="10"/>| Danbala / Simbi <text:s/>| konesans, aprann, sekrè, limyè</text:p>
      <text:p text:style-name="Standard">Tu es choisi / appel <text:s text:c="2"/>| Lwa spécifique <text:s text:c="2"/>| rele, chwazi, misyon, ason</text:p>
      <text:p text:style-name="Standard"/>
      <text:p text:style-name="Standard">================================================================</text:p>
      <text:p text:style-name="Standard">FIN DU DOCUMENT ENRICHI — 37 RÊVES COMPLETS</text:p>
      <text:p text:style-name="Standard">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01:09:50.636355909</meta:creation-date>
    <dc:date>2026-05-31T01:10:28.062410363</dc:date>
    <meta:editing-duration>PT38S</meta:editing-duration>
    <meta:editing-cycles>1</meta:editing-cycles>
    <meta:document-statistic meta:table-count="0" meta:image-count="0" meta:object-count="0" meta:page-count="29" meta:paragraph-count="1221" meta:word-count="8971" meta:character-count="64452" meta:non-whitespace-character-count="49675"/>
    <meta:generator>LibreOffice/7.4.5.1$MacOSX_X86_64 LibreOffice_project/9c0871452b3918c1019dde9bfac75448afc4b57f</meta:generator>
  </office:meta>
</office:document-meta>
</file>